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7068AAEB3B.jpg" manifest:media-type="image/jpeg"/>
  <manifest:file-entry manifest:full-path="Pictures/10000000000002CE00000326006908FC.jpg" manifest:media-type="image/jpeg"/>
  <manifest:file-entry manifest:full-path="Pictures/TablePreview1.svm" manifest:media-type=""/>
  <manifest:file-entry manifest:full-path="Pictures/10000000000002690000024771466199.jpg" manifest:media-type="image/jpeg"/>
  <manifest:file-entry manifest:full-path="Pictures/10000000000002CF00000313D661C2F3.jpg" manifest:media-type="image/jpeg"/>
  <manifest:file-entry manifest:full-path="Pictures/100000000000027200000273AE34944E.jpg" manifest:media-type="image/jpeg"/>
  <manifest:file-entry manifest:full-path="Pictures/10000000000002730000027796D0B349.jpg" manifest:media-type="image/jpeg"/>
  <manifest:file-entry manifest:full-path="Pictures/10000000000004F900000279A90F9BF4.jpg" manifest:media-type="image/jpeg"/>
  <manifest:file-entry manifest:full-path="Pictures/100000010000200000001EC552695A35.png" manifest:media-type="image/png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74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c9973a" draw:fill="solid" draw:fill-color="#c9973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c9973a" draw:fill="solid" draw:fill-color="#2233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42cm" svg:stroke-color="#e8edf7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35cm" svg:stroke-color="#1a2744" draw:fill="solid" draw:fill-color="#1a27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e8edf7" draw:fill="solid" draw:fill-color="#f4f6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7b8bb2" draw:fill="solid" draw:fill-color="#7b8bb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e8edf7" draw:fill="solid" draw:fill-color="#e8edf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>
      <style:graphic-properties loext:decorative="false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>
      <style:graphic-properties draw:stroke="solid" svg:stroke-width="0.028cm" svg:stroke-color="#e8edf7" draw:fill="solid" draw:fill-color="#f4f6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>
      <style:graphic-properties draw:stroke="solid" svg:stroke-width="0.042cm" svg:stroke-color="#c9973a" draw:fill="solid" draw:fill-color="#f4f6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3" style:family="graphic" style:parent-style-name="standard">
      <style:graphic-properties draw:stroke="solid" svg:stroke-width="0.035cm" svg:stroke-color="#c9973a" draw:fill="solid" draw:fill-color="#fff8e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8" style:family="graphic" style:parent-style-name="standard">
      <style:graphic-properties draw:stroke="solid" svg:stroke-width="0.028cm" svg:stroke-color="#e8edf7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9" style:family="graphic" style:parent-style-name="standard">
      <style:graphic-properties draw:stroke="solid" svg:stroke-width="0.035cm" svg:stroke-color="#c0392b" draw:fill="solid" draw:fill-color="#c0392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9" style:family="graphic" style:parent-style-name="standard">
      <style:graphic-properties draw:stroke="solid" svg:stroke-width="0.035cm" svg:stroke-color="#2857a7" draw:fill="solid" draw:fill-color="#2857a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794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co3" style:family="table-column">
      <style:table-column-properties style:column-width="2.159cm" style:use-optimal-column-width="false"/>
    </style:style>
    <style:style style:name="co4" style:family="table-column">
      <style:table-column-properties style:column-width="6.477cm" style:use-optimal-column-width="false"/>
    </style:style>
    <style:style style:name="co5" style:family="table-column">
      <style:table-column-properties style:column-width="2.921cm" style:use-optimal-column-width="false"/>
    </style:style>
    <style:style style:name="co6" style:family="table-column">
      <style:table-column-properties style:column-width="3.81cm" style:use-optimal-column-width="false"/>
    </style:style>
    <style:style style:name="co7" style:family="table-column">
      <style:table-column-properties style:column-width="6.35cm" style:use-optimal-column-width="false"/>
    </style:style>
    <style:style style:name="co8" style:family="table-column">
      <style:table-column-properties style:column-width="4.572cm" style:use-optimal-column-width="false"/>
    </style:style>
    <style:style style:name="co9" style:family="table-column">
      <style:table-column-properties style:column-width="8.636cm" style:use-optimal-column-width="false"/>
    </style:style>
    <style:style style:name="ro1" style:family="table-row">
      <style:table-row-properties style:row-height="0.762cm" style:use-optimal-row-height="false"/>
    </style:style>
    <style:style style:name="ro2" style:family="table-row">
      <style:table-row-properties style:row-height="0.711cm" style:use-optimal-row-height="false"/>
    </style:style>
    <style:style style:name="ce1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4pt solid #e8edf7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4pt solid #e8edf7" style:font-independent-line-spacing="true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pt solid #e8edf7" style:font-independent-line-spacing="true"/>
    </style:style>
    <style:style style:name="ce4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34pt solid #e8edf7" style:font-independent-line-spacing="true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34pt solid #e8edf7" style:font-independent-line-spacing="true"/>
    </style:style>
    <style:style style:name="P1" style:family="paragraph">
      <loext:graphic-properties draw:fill="solid" draw:fill-color="#c9973a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223366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1a2744"/>
      <style:paragraph-properties fo:text-align="start"/>
      <style:text-properties fo:font-size="18pt"/>
    </style:style>
    <style:style style:name="P12" style:family="paragraph">
      <loext:graphic-properties draw:fill="solid" draw:fill-color="#f4f6fb"/>
      <style:paragraph-properties fo:text-align="start"/>
      <style:text-properties fo:font-size="18pt"/>
    </style:style>
    <style:style style:name="P13" style:family="paragraph">
      <loext:graphic-properties draw:fill="solid" draw:fill-color="#7b8bb2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e8edf7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.176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.176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9" style:family="paragraph">
      <loext:graphic-properties draw:fill="solid" draw:fill-color="#fff8ec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P21" style:family="paragraph">
      <loext:graphic-properties draw:fill="solid" draw:fill-color="#c0392b"/>
      <style:paragraph-properties fo:text-align="start"/>
      <style:text-properties fo:font-size="18pt"/>
    </style:style>
    <style:style style:name="P22" style:family="paragraph">
      <loext:graphic-properties draw:fill="solid" draw:fill-color="#2857a7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2pt" fo:letter-spacing="normal" fo:language="en" fo:country="US" fo:font-style="normal" style:text-underline-style="none" fo:font-weight="bold" fo:background-color="transparent" style:font-name-asian="Calibri2" style:font-size-asian="52pt" style:font-style-asian="normal" style:font-weight-asian="bold" style:font-name-complex="Calibri" style:font-size-complex="52pt" style:font-style-complex="normal" style:font-weight-complex="bold"/>
    </style:style>
    <style:style style:name="T2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name-asian="Calibri2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3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font-variant="normal" fo:text-transform="none" fo:color="#7b9bc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7" style:family="text">
      <style:text-properties fo:font-variant="normal" fo:text-transform="none" fo:color="#aabbdd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8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9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0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11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13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2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14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bold" fo:background-color="transparent" style:font-name-asian="Calibri2" style:font-size-asian="12.5pt" style:font-style-asian="normal" style:font-weight-asian="bold" style:font-name-complex="Calibri" style:font-size-complex="12.5pt" style:font-style-complex="normal" style:font-weight-complex="bold"/>
    </style:style>
    <style:style style:name="T18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0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1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22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2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23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2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bold" fo:background-color="transparent" style:font-name-asian="Calibri2" style:font-size-asian="12.5pt" style:font-style-asian="normal" style:font-weight-asian="bold" style:font-name-complex="Calibri" style:font-size-complex="12.5pt" style:font-style-complex="normal" style:font-weight-complex="bold"/>
    </style:style>
    <style:style style:name="T27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8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bold" fo:background-color="transparent" style:font-name-asian="Calibri2" style:font-size-asian="13.5pt" style:font-style-asian="normal" style:font-weight-asian="bold" style:font-name-complex="Calibri" style:font-size-complex="13.5pt" style:font-style-complex="normal" style:font-weight-complex="bold"/>
    </style:style>
    <style:style style:name="T29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2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30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3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4" style:family="text">
      <style:text-properties fo:font-variant="normal" fo:text-transform="none" fo:color="#aabbd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5" style:family="text">
      <style:text-properties fo:font-variant="normal" fo:text-transform="none" fo:color="#7a5a00" loext:opacity="100%" style:text-outline="false" style:text-line-through-style="none" style:text-line-through-type="none" style:text-position="0% 100%" style:font-name="Calibri" fo:font-size="12.5pt" fo:letter-spacing="normal" fo:language="en" fo:country="US" fo:font-style="italic" style:text-underline-style="none" fo:font-weight="normal" fo:background-color="transparent" style:font-name-asian="Calibri2" style:font-size-asian="12.5pt" style:font-style-asian="italic" style:font-weight-asian="normal" style:font-name-complex="Calibri" style:font-size-complex="12.5pt" style:font-style-complex="italic" style:font-weight-complex="normal"/>
    </style:style>
    <style:style style:name="T36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37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8" style:family="text">
      <style:text-properties fo:font-variant="normal" fo:text-transform="none" fo:color="#1e8449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39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en" fo:country="US" fo:font-style="normal" style:text-underline-style="none" fo:font-weight="bold" fo:background-color="transparent" style:font-name-asian="Calibri2" style:font-size-asian="58pt" style:font-style-asian="normal" style:font-weight-asian="bold" style:font-name-complex="Calibri" style:font-size-complex="58pt" style:font-style-complex="normal" style:font-weight-complex="bold"/>
    </style:style>
    <style:style style:name="T41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Calibri2" style:font-size-asian="22pt" style:font-style-asian="normal" style:font-weight-asian="normal" style:font-name-complex="Calibri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997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b9b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27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abb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1a27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b8b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857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7a5a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039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e84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Shape 0" draw:style-name="gr1" draw:text-style-name="P1" draw:layer="layout" svg:width="25.399cm" svg:height="0.30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317cm" svg:x="0cm" svg:y="13.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" draw:text-style-name="P3" draw:layer="layout" svg:width="22.351cm" svg:height="3.555cm" svg:x="1.524cm" svg:y="3.048cm">
          <text:p text:style-name="P2"><text:span text:style-name="T1">Clon de Agape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3" draw:layer="layout" svg:width="22.351cm" svg:height="1.777cm" svg:x="1.524cm" svg:y="6.731cm">
          <text:p text:style-name="P2"><text:span text:style-name="T2">Plataforma de Venta de Libros On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5.333cm" svg:height="1.142cm" svg:x="1.397cm" svg:y="9.017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5" draw:text-style-name="P3" draw:layer="layout" svg:width="5.333cm" svg:height="1.142cm" svg:x="1.397cm" svg:y="9.017cm">
          <text:p text:style-name="P2"><text:span text:style-name="T3">PHP 8 ·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5.333cm" svg:height="1.142cm" svg:x="7.112cm" svg:y="9.017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6" draw:text-style-name="P3" draw:layer="layout" svg:width="5.333cm" svg:height="1.142cm" svg:x="7.112cm" svg:y="9.017cm">
          <text:p text:style-name="P2"><text:span text:style-name="T3">Vanilla JS ES6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4" draw:layer="layout" svg:width="5.333cm" svg:height="1.142cm" svg:x="12.827cm" svg:y="9.017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7" draw:text-style-name="P3" draw:layer="layout" svg:width="5.333cm" svg:height="1.142cm" svg:x="12.827cm" svg:y="9.017cm">
          <text:p text:style-name="P2"><text:span text:style-name="T3">MySQL / Maria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4" draw:layer="layout" svg:width="5.333cm" svg:height="1.142cm" svg:x="18.542cm" svg:y="9.017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8" draw:text-style-name="P3" draw:layer="layout" svg:width="5.333cm" svg:height="1.142cm" svg:x="18.542cm" svg:y="9.017cm">
          <text:p text:style-name="P2"><text:span text:style-name="T3">API REST · Headl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" draw:text-style-name="P3" draw:layer="layout" svg:width="22.351cm" svg:height="1.142cm" svg:x="1.524cm" svg:y="10.922cm">
          <text:p text:style-name="P2"><text:span text:style-name="T4">Richard · Tomás <text:s/>| <text:s/>ASIR -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2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" draw:text-style-name="P9" draw:layer="layout" svg:width="23.113cm" svg:height="1.65cm" svg:x="1.397cm" svg:y="0.457cm">
          <text:p text:style-name="P8"><text:span text:style-name="T6">Índ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" draw:text-style-name="P3" draw:layer="layout" svg:width="1.269cm" svg:height="0.698cm" svg:x="23.876cm" svg:y="13.589cm">
          <text:p text:style-name="P2"><text:span text:style-name="T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6" draw:text-style-name="P12" draw:layer="layout" svg:width="11.429cm" svg:height="1.574cm" svg:x="1.27cm" svg:y="2.6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" draw:text-style-name="P3" draw:layer="layout" svg:width="1.396cm" svg:height="1.574cm" svg:x="1.524cm" svg:y="2.667cm">
          <text:p text:style-name="P2"><text:span text:style-name="T8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8" draw:text-style-name="P13" draw:layer="layout" svg:width="0.075cm" svg:height="0.812cm" svg:x="2.921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9" draw:text-style-name="P9" draw:layer="layout" svg:width="9.143cm" svg:height="1.574cm" svg:x="3.175cm" svg:y="2.667cm">
          <text:p text:style-name="P8"><text:span text:style-name="T9">Descripción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6" draw:text-style-name="P12" draw:layer="layout" svg:width="11.429cm" svg:height="1.574cm" svg:x="1.27cm" svg:y="4.6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0" draw:text-style-name="P3" draw:layer="layout" svg:width="1.396cm" svg:height="1.574cm" svg:x="1.524cm" svg:y="4.648cm">
          <text:p text:style-name="P2"><text:span text:style-name="T8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8" draw:text-style-name="P13" draw:layer="layout" svg:width="0.075cm" svg:height="0.812cm" svg:x="2.921cm" svg:y="5.0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" draw:text-style-name="P9" draw:layer="layout" svg:width="9.143cm" svg:height="1.574cm" svg:x="3.175cm" svg:y="4.648cm">
          <text:p text:style-name="P8"><text:span text:style-name="T9">Arquitectura del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" draw:text-style-name="P12" draw:layer="layout" svg:width="11.429cm" svg:height="1.574cm" svg:x="1.27cm" svg:y="6.6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" draw:text-style-name="P3" draw:layer="layout" svg:width="1.396cm" svg:height="1.574cm" svg:x="1.524cm" svg:y="6.629cm">
          <text:p text:style-name="P2"><text:span text:style-name="T8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8" draw:text-style-name="P13" draw:layer="layout" svg:width="0.075cm" svg:height="0.812cm" svg:x="2.921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3" draw:text-style-name="P9" draw:layer="layout" svg:width="9.143cm" svg:height="1.574cm" svg:x="3.175cm" svg:y="6.629cm">
          <text:p text:style-name="P8"><text:span text:style-name="T9">Stack Tecnológ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6" draw:text-style-name="P12" draw:layer="layout" svg:width="11.429cm" svg:height="1.574cm" svg:x="1.27cm" svg:y="8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4" draw:text-style-name="P3" draw:layer="layout" svg:width="1.396cm" svg:height="1.574cm" svg:x="1.524cm" svg:y="8.611cm">
          <text:p text:style-name="P2"><text:span text:style-name="T8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8" draw:text-style-name="P13" draw:layer="layout" svg:width="0.075cm" svg:height="0.812cm" svg:x="2.921cm" svg:y="8.9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5" draw:text-style-name="P9" draw:layer="layout" svg:width="9.143cm" svg:height="1.574cm" svg:x="3.175cm" svg:y="8.611cm">
          <text:p text:style-name="P8"><text:span text:style-name="T9">Diseño de Interfa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6" draw:text-style-name="P12" draw:layer="layout" svg:width="11.429cm" svg:height="1.574cm" svg:x="1.27cm" svg:y="10.5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6" draw:text-style-name="P3" draw:layer="layout" svg:width="1.396cm" svg:height="1.574cm" svg:x="1.524cm" svg:y="10.592cm">
          <text:p text:style-name="P2"><text:span text:style-name="T8">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8" draw:text-style-name="P13" draw:layer="layout" svg:width="0.075cm" svg:height="0.812cm" svg:x="2.921cm" svg:y="10.9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7" draw:text-style-name="P9" draw:layer="layout" svg:width="9.143cm" svg:height="1.574cm" svg:x="3.175cm" svg:y="10.592cm">
          <text:p text:style-name="P8"><text:span text:style-name="T9">Base de Da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6" draw:text-style-name="P12" draw:layer="layout" svg:width="11.429cm" svg:height="1.574cm" svg:x="13.462cm" svg:y="2.6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8" draw:text-style-name="P3" draw:layer="layout" svg:width="1.396cm" svg:height="1.574cm" svg:x="13.716cm" svg:y="2.667cm">
          <text:p text:style-name="P2"><text:span text:style-name="T8">0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8" draw:text-style-name="P13" draw:layer="layout" svg:width="0.075cm" svg:height="0.812cm" svg:x="15.113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9" draw:text-style-name="P9" draw:layer="layout" svg:width="9.143cm" svg:height="1.574cm" svg:x="15.367cm" svg:y="2.667cm">
          <text:p text:style-name="P8"><text:span text:style-name="T9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6" draw:text-style-name="P12" draw:layer="layout" svg:width="11.429cm" svg:height="1.574cm" svg:x="13.462cm" svg:y="4.6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0" draw:text-style-name="P3" draw:layer="layout" svg:width="1.396cm" svg:height="1.574cm" svg:x="13.716cm" svg:y="4.648cm">
          <text:p text:style-name="P2"><text:span text:style-name="T8">0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8" draw:text-style-name="P13" draw:layer="layout" svg:width="0.075cm" svg:height="0.812cm" svg:x="15.113cm" svg:y="5.0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1" draw:text-style-name="P9" draw:layer="layout" svg:width="9.143cm" svg:height="1.574cm" svg:x="15.367cm" svg:y="4.648cm">
          <text:p text:style-name="P8"><text:span text:style-name="T9">Funcionalidades Cla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6" draw:text-style-name="P12" draw:layer="layout" svg:width="11.429cm" svg:height="1.574cm" svg:x="13.462cm" svg:y="6.6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32" draw:text-style-name="P3" draw:layer="layout" svg:width="1.396cm" svg:height="1.574cm" svg:x="13.716cm" svg:y="6.629cm">
          <text:p text:style-name="P2"><text:span text:style-name="T8">0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8" draw:text-style-name="P13" draw:layer="layout" svg:width="0.075cm" svg:height="0.812cm" svg:x="15.113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33" draw:text-style-name="P9" draw:layer="layout" svg:width="9.143cm" svg:height="1.574cm" svg:x="15.367cm" svg:y="6.629cm">
          <text:p text:style-name="P8"><text:span text:style-name="T9">Uso de 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6" draw:text-style-name="P12" draw:layer="layout" svg:width="11.429cm" svg:height="1.574cm" svg:x="13.462cm" svg:y="8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34" draw:text-style-name="P3" draw:layer="layout" svg:width="1.396cm" svg:height="1.574cm" svg:x="13.716cm" svg:y="8.611cm">
          <text:p text:style-name="P2"><text:span text:style-name="T8">0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8" draw:text-style-name="P13" draw:layer="layout" svg:width="0.075cm" svg:height="0.812cm" svg:x="15.113cm" svg:y="8.9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5" draw:text-style-name="P9" draw:layer="layout" svg:width="9.143cm" svg:height="1.574cm" svg:x="15.367cm" svg:y="8.611cm">
          <text:p text:style-name="P8"><text:span text:style-name="T9">Problemas y Solu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6" draw:text-style-name="P12" draw:layer="layout" svg:width="11.429cm" svg:height="1.574cm" svg:x="13.462cm" svg:y="10.5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6" draw:text-style-name="P3" draw:layer="layout" svg:width="1.396cm" svg:height="1.574cm" svg:x="13.716cm" svg:y="10.592cm">
          <text:p text:style-name="P2"><text:span text:style-name="T8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8" draw:text-style-name="P13" draw:layer="layout" svg:width="0.075cm" svg:height="0.812cm" svg:x="15.113cm" svg:y="10.97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37" draw:text-style-name="P9" draw:layer="layout" svg:width="9.143cm" svg:height="1.574cm" svg:x="15.367cm" svg:y="10.592cm">
          <text:p text:style-name="P8"><text:span text:style-name="T9">Conclusión y Mejo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3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" draw:text-style-name="P9" draw:layer="layout" svg:width="23.113cm" svg:height="1.65cm" svg:x="1.397cm" svg:y="0.457cm">
          <text:p text:style-name="P8"><text:span text:style-name="T6">Descripción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9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0" draw:text-style-name="P3" draw:layer="layout" svg:width="1.269cm" svg:height="0.698cm" svg:x="23.876cm" svg:y="13.589cm">
          <text:p text:style-name="P2"><text:span text:style-name="T7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9" draw:layer="layout" svg:width="11.429cm" svg:height="0.964cm" svg:x="1.016cm" svg:y="2.54cm">
          <text:p text:style-name="P8"><text:span text:style-name="T10">Motiv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15" draw:layer="layout" svg:width="11.683cm" svg:height="2.92cm" svg:x="1.016cm" svg:y="3.505cm">
          <text:list text:style-name="L8">
            <text:list-item>
              <text:p text:style-name="P14"><text:span text:style-name="T11">Clonado funcional de Agapea.com como referencia real de e-commerce de libros</text:span></text:p>
            </text:list-item>
            <text:list-item>
              <text:p text:style-name="P14"><text:span text:style-name="T11">Sector librerías independientes con escasa presencia digital</text:span></text:p>
            </text:list-item>
            <text:list-item>
              <text:p text:style-name="P14"><text:span text:style-name="T11">Aplicabilidad directa en el mercado labora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" draw:text-style-name="P9" draw:layer="layout" svg:width="11.429cm" svg:height="0.964cm" svg:x="1.016cm" svg:y="6.731cm">
          <text:p text:style-name="P8"><text:span text:style-name="T10">Objetivo Princip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4" draw:text-style-name="P15" draw:layer="layout" svg:width="11.683cm" svg:height="2.666cm" svg:x="1.016cm" svg:y="7.696cm">
          <text:list text:style-name="L8">
            <text:list-item>
              <text:p text:style-name="P14"><text:span text:style-name="T11">Arquitectura desacoplada: frontend independiente del backend</text:span></text:p>
            </text:list-item>
            <text:list-item>
              <text:p text:style-name="P14"><text:span text:style-name="T11">API REST propia con Laravel</text:span></text:p>
            </text:list-item>
            <text:list-item>
              <text:p text:style-name="P14"><text:span text:style-name="T11">Interfaz funcional para clientes y administrador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5" draw:text-style-name="P16" draw:layer="layout" svg:width="0.075cm" svg:height="8.127cm" svg:x="13.208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6" draw:text-style-name="P9" draw:layer="layout" svg:width="10.667cm" svg:height="0.964cm" svg:x="13.716cm" svg:y="2.54cm">
          <text:p text:style-name="P8"><text:span text:style-name="T10">Tipos de Usu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6" draw:text-style-name="P12" draw:layer="layout" svg:width="10.413cm" svg:height="1.828cm" svg:x="13.716cm" svg:y="3.81cm">
          <text:p/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3" draw:style-name="gr47" draw:text-style-name="P9" draw:layer="layout" svg:width="10.159cm" svg:height="0.812cm" svg:x="14.097cm" svg:y="3.81cm">
          <text:p text:style-name="P8"><text:span text:style-name="T12">👁 <text:s/>Visita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8" draw:text-style-name="P9" draw:layer="layout" svg:width="10.159cm" svg:height="0.761cm" svg:x="14.097cm" svg:y="4.623cm">
          <text:p text:style-name="P8"><text:span text:style-name="T13">Acceso de solo lectura al catálogo públ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6" draw:text-style-name="P12" draw:layer="layout" svg:width="10.413cm" svg:height="1.828cm" svg:x="13.716cm" svg:y="6.045cm">
          <text:p/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49" draw:text-style-name="P9" draw:layer="layout" svg:width="10.159cm" svg:height="0.812cm" svg:x="14.097cm" svg:y="6.045cm">
          <text:p text:style-name="P8"><text:span text:style-name="T12">🛒 <text:s/>Cli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0" draw:text-style-name="P9" draw:layer="layout" svg:width="10.159cm" svg:height="0.761cm" svg:x="14.097cm" svg:y="6.858cm">
          <text:p text:style-name="P8"><text:span text:style-name="T13">Carrito, favoritos, reseñas y pedi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6" draw:text-style-name="P12" draw:layer="layout" svg:width="10.413cm" svg:height="1.828cm" svg:x="13.716cm" svg:y="8.28cm">
          <text:p/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9" draw:style-name="gr51" draw:text-style-name="P9" draw:layer="layout" svg:width="10.159cm" svg:height="0.812cm" svg:x="14.097cm" svg:y="8.28cm">
          <text:p text:style-name="P8"><text:span text:style-name="T12">⚙️ <text:s/>Administr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9" draw:layer="layout" svg:width="10.159cm" svg:height="0.761cm" svg:x="14.097cm" svg:y="9.093cm">
          <text:p text:style-name="P8"><text:span text:style-name="T13">Panel CRUD: libros, pedidos, usuarios, cup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3" presentation:class="page"/>
          <draw:frame draw:name="Notes Placeholder 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4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3" draw:text-style-name="P9" draw:layer="layout" svg:width="23.113cm" svg:height="1.65cm" svg:x="1.397cm" svg:y="0.457cm">
          <text:p text:style-name="P8"><text:span text:style-name="T6">Arquitectura del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4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5" draw:text-style-name="P3" draw:layer="layout" svg:width="1.269cm" svg:height="0.698cm" svg:x="23.876cm" svg:y="13.589cm">
          <text:p text:style-name="P2"><text:span text:style-name="T7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12.191cm" svg:height="9.143cm" svg:x="1.016cm" svg:y="2.413cm">
          <draw:image xlink:href="Pictures/10000000000002800000017068AAEB3B.jpg" xlink:type="simple" xlink:show="embed" xlink:actuate="onLoad" draw:mime-type="image/jpeg">
            <text:p/>
          </draw:image>
          <svg:desc>preencoded.png</svg:desc>
        </draw:frame>
        <draw:custom-shape draw:name="Text 6" draw:style-name="gr57" draw:text-style-name="P9" draw:layer="layout" svg:width="10.413cm" svg:height="0.964cm" svg:x="14cm" svg:y="2.107cm">
          <text:p text:style-name="P8"><text:span text:style-name="T14">Arquitectura Headless (Desacoplad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8" draw:text-style-name="P15" draw:layer="layout" svg:width="10.413cm" svg:height="3.428cm" svg:x="13.97cm" svg:y="3.607cm">
          <text:list text:style-name="L8">
            <text:list-item>
              <text:p text:style-name="P14"><text:span text:style-name="T11">Frontend y backend son proyectos independientes</text:span></text:p>
            </text:list-item>
            <text:list-item>
              <text:p text:style-name="P14"><text:span text:style-name="T11">Comunicación exclusiva por HTTP + JSON</text:span></text:p>
            </text:list-item>
            <text:list-item>
              <text:p text:style-name="P14"><text:span text:style-name="T11">Backend patrón MVC (Laravel): la vista es JSON</text:span></text:p>
            </text:list-item>
            <text:list-item>
              <text:p text:style-name="P14"><text:span text:style-name="T11">Token Bearer gestionado por Laravel Sanctum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9" draw:layer="layout" svg:width="10.667cm" svg:height="3.81cm" svg:x="13.749cm" svg:y="8.057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15">Front Office</text:span></text:p>
              </table:table-cell>
              <table:table-cell>
                <text:p text:style-name="P2"><text:span text:style-name="T15">Back Offic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Tipo</text:span></text:p>
              </table:table-cell>
              <table:table-cell>
                <text:p text:style-name="P8"><text:span text:style-name="T16">MPA</text:span></text:p>
              </table:table-cell>
              <table:table-cell>
                <text:p text:style-name="P8"><text:span text:style-name="T16">SPA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Carpeta</text:span></text:p>
              </table:table-cell>
              <table:table-cell>
                <text:p text:style-name="P8"><text:span text:style-name="T16">agapea-frontend/</text:span></text:p>
              </table:table-cell>
              <table:table-cell>
                <text:p text:style-name="P8"><text:span text:style-name="T16">adm-agapea/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Stack</text:span></text:p>
              </table:table-cell>
              <table:table-cell>
                <text:p text:style-name="P8"><text:span text:style-name="T16">Vanilla JS · HTML</text:span></text:p>
              </table:table-cell>
              <table:table-cell>
                <text:p text:style-name="P8"><text:span text:style-name="T16">Vanilla JS · Router J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Usuarios</text:span></text:p>
              </table:table-cell>
              <table:table-cell>
                <text:p text:style-name="P8"><text:span text:style-name="T16">Clientes / Visitantes</text:span></text:p>
              </table:table-cell>
              <table:table-cell>
                <text:p text:style-name="P8"><text:span text:style-name="T16">Administrador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0" draw:layer="layout" svg:width="15.239cm" svg:height="8.572cm" svg:x="1.905cm" svg:y="3.175cm" draw:page-number="4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5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0" draw:text-style-name="P9" draw:layer="layout" svg:width="23.113cm" svg:height="1.65cm" svg:x="1.397cm" svg:y="0.457cm">
          <text:p text:style-name="P8"><text:span text:style-name="T6">Stack Tecnológ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1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2" draw:text-style-name="P3" draw:layer="layout" svg:width="1.269cm" svg:height="0.698cm" svg:x="23.876cm" svg:y="13.589cm">
          <text:p text:style-name="P2"><text:span text:style-name="T7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0.151cm" svg:height="0.888cm" svg:x="1.016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3" draw:text-style-name="P9" draw:layer="layout" svg:width="10.159cm" svg:height="0.888cm" svg:x="1.422cm" svg:y="2.413cm">
          <text:p text:style-name="P8"><text:span text:style-name="T14">Front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4" draw:text-style-name="P12" draw:layer="layout" svg:width="11.429cm" svg:height="1.32cm" svg:x="1.016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5" draw:text-style-name="P9" draw:layer="layout" svg:width="10.667cm" svg:height="0.659cm" svg:x="1.397cm" svg:y="3.505cm">
          <text:p text:style-name="P8"><text:span text:style-name="T17">HTML5 + CSS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6" draw:text-style-name="P9" draw:layer="layout" svg:width="10.667cm" svg:height="0.558cm" svg:x="1.397cm" svg:y="4.166cm">
          <text:p text:style-name="P8"><text:span text:style-name="T18">Estructura y estilos (sin framework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64" draw:text-style-name="P12" draw:layer="layout" svg:width="11.429cm" svg:height="1.32cm" svg:x="1.016cm" svg:y="5.0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7" draw:text-style-name="P9" draw:layer="layout" svg:width="10.667cm" svg:height="0.659cm" svg:x="1.397cm" svg:y="5.055cm">
          <text:p text:style-name="P8"><text:span text:style-name="T17">Vanilla JS ES6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8" draw:text-style-name="P9" draw:layer="layout" svg:width="10.667cm" svg:height="0.558cm" svg:x="1.397cm" svg:y="5.715cm">
          <text:p text:style-name="P8"><text:span text:style-name="T18">Módulos, fetch, async/await, DO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4" draw:text-style-name="P12" draw:layer="layout" svg:width="11.429cm" svg:height="1.32cm" svg:x="1.016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9" draw:text-style-name="P9" draw:layer="layout" svg:width="10.667cm" svg:height="0.659cm" svg:x="1.397cm" svg:y="6.604cm">
          <text:p text:style-name="P8"><text:span text:style-name="T17">Chart.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0" draw:text-style-name="P9" draw:layer="layout" svg:width="10.667cm" svg:height="0.558cm" svg:x="1.397cm" svg:y="7.264cm">
          <text:p text:style-name="P8"><text:span text:style-name="T18">Gráficas en el panel de administ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4" draw:text-style-name="P12" draw:layer="layout" svg:width="11.429cm" svg:height="1.32cm" svg:x="1.016cm" svg:y="8.1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1" draw:text-style-name="P9" draw:layer="layout" svg:width="10.667cm" svg:height="0.659cm" svg:x="1.397cm" svg:y="8.153cm">
          <text:p text:style-name="P8"><text:span text:style-name="T17">SweetAlert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2" draw:text-style-name="P9" draw:layer="layout" svg:width="10.667cm" svg:height="0.558cm" svg:x="1.397cm" svg:y="8.814cm">
          <text:p text:style-name="P8"><text:span text:style-name="T18">Modales de confirmación de ac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64" draw:text-style-name="P12" draw:layer="layout" svg:width="11.429cm" svg:height="1.32cm" svg:x="1.016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3" draw:text-style-name="P9" draw:layer="layout" svg:width="10.667cm" svg:height="0.659cm" svg:x="1.397cm" svg:y="9.703cm">
          <text:p text:style-name="P8"><text:span text:style-name="T17">FontAweso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4" draw:text-style-name="P9" draw:layer="layout" svg:width="10.667cm" svg:height="0.558cm" svg:x="1.397cm" svg:y="10.363cm">
          <text:p text:style-name="P8"><text:span text:style-name="T18">Iconografía vía CD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0.151cm" svg:height="0.888cm" svg:x="13.208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5" draw:text-style-name="P9" draw:layer="layout" svg:width="10.159cm" svg:height="0.888cm" svg:x="13.614cm" svg:y="2.413cm">
          <text:p text:style-name="P8"><text:span text:style-name="T14">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64" draw:text-style-name="P12" draw:layer="layout" svg:width="11.302cm" svg:height="1.32cm" svg:x="13.208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76" draw:text-style-name="P9" draw:layer="layout" svg:width="10.54cm" svg:height="0.659cm" svg:x="13.589cm" svg:y="3.505cm">
          <text:p text:style-name="P8"><text:span text:style-name="T17">Laravel (PHP 8.x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77" draw:text-style-name="P9" draw:layer="layout" svg:width="10.54cm" svg:height="0.558cm" svg:x="13.589cm" svg:y="4.166cm">
          <text:p text:style-name="P8"><text:span text:style-name="T18">Framework MVC, Eloquent ORM, rutas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64" draw:text-style-name="P12" draw:layer="layout" svg:width="11.302cm" svg:height="1.32cm" svg:x="13.208cm" svg:y="5.0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78" draw:text-style-name="P9" draw:layer="layout" svg:width="10.54cm" svg:height="0.659cm" svg:x="13.589cm" svg:y="5.055cm">
          <text:p text:style-name="P8"><text:span text:style-name="T17">Laravel Sanct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9" draw:text-style-name="P9" draw:layer="layout" svg:width="10.54cm" svg:height="0.558cm" svg:x="13.589cm" svg:y="5.715cm">
          <text:p text:style-name="P8"><text:span text:style-name="T18">Autenticación stateless por token Bear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64" draw:text-style-name="P12" draw:layer="layout" svg:width="11.302cm" svg:height="1.32cm" svg:x="13.208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80" draw:text-style-name="P9" draw:layer="layout" svg:width="10.54cm" svg:height="0.659cm" svg:x="13.589cm" svg:y="6.604cm">
          <text:p text:style-name="P8"><text:span text:style-name="T17">MySQL / Maria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81" draw:text-style-name="P9" draw:layer="layout" svg:width="10.54cm" svg:height="0.558cm" svg:x="13.589cm" svg:y="7.264cm">
          <text:p text:style-name="P8"><text:span text:style-name="T18">Base de datos relacional + XAM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64" draw:text-style-name="P12" draw:layer="layout" svg:width="11.302cm" svg:height="1.32cm" svg:x="13.208cm" svg:y="8.1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82" draw:text-style-name="P9" draw:layer="layout" svg:width="10.54cm" svg:height="0.659cm" svg:x="13.589cm" svg:y="8.153cm">
          <text:p text:style-name="P8"><text:span text:style-name="T17">Compos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83" draw:text-style-name="P9" draw:layer="layout" svg:width="10.54cm" svg:height="0.558cm" svg:x="13.589cm" svg:y="8.814cm">
          <text:p text:style-name="P8"><text:span text:style-name="T18">Gestor de paquetes PH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64" draw:text-style-name="P12" draw:layer="layout" svg:width="11.302cm" svg:height="1.32cm" svg:x="13.208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84" draw:text-style-name="P9" draw:layer="layout" svg:width="10.54cm" svg:height="0.659cm" svg:x="13.589cm" svg:y="9.703cm">
          <text:p text:style-name="P8"><text:span text:style-name="T17">Antigravity (I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85" draw:text-style-name="P9" draw:layer="layout" svg:width="10.54cm" svg:height="0.558cm" svg:x="13.589cm" svg:y="10.363cm">
          <text:p text:style-name="P8"><text:span text:style-name="T18">Scaffolding asistido: modelos, migraciones, controlad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5" presentation:class="page"/>
          <draw:frame draw:name="Notes Placeholder 2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6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6" draw:text-style-name="P9" draw:layer="layout" svg:width="23.113cm" svg:height="1.65cm" svg:x="1.397cm" svg:y="0.457cm">
          <text:p text:style-name="P8"><text:span text:style-name="T6">Diseño de Interfaces — Vista Principal (Hom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7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8" draw:text-style-name="P3" draw:layer="layout" svg:width="1.269cm" svg:height="0.698cm" svg:x="23.876cm" svg:y="13.589cm">
          <text:p text:style-name="P2"><text:span text:style-name="T7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9" draw:text-style-name="P3" draw:layer="layout" svg:width="11.429cm" svg:height="0.812cm" svg:x="1.016cm" svg:y="2.413cm">
          <text:p text:style-name="P2"><text:span text:style-name="T19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11.429cm" svg:height="9.397cm" svg:x="1.016cm" svg:y="3.302cm">
          <draw:image xlink:href="Pictures/10000000000002CF00000313D661C2F3.jpg" xlink:type="simple" xlink:show="embed" xlink:actuate="onLoad" draw:mime-type="image/jpeg">
            <text:p/>
          </draw:image>
          <svg:desc>preencoded.png</svg:desc>
        </draw:frame>
        <draw:custom-shape draw:name="Text 7" draw:style-name="gr90" draw:text-style-name="P3" draw:layer="layout" svg:width="11.429cm" svg:height="0.812cm" svg:x="12.954cm" svg:y="2.413cm">
          <text:p text:style-name="P2"><text:span text:style-name="T20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6" draw:text-style-name="P10" draw:layer="layout" svg:width="11.429cm" svg:height="9.397cm" svg:x="12.954cm" svg:y="3.302cm">
          <draw:image xlink:href="Pictures/100000000000027200000273AE34944E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Slide Image Placeholder 1" draw:style-name="gr10" draw:layer="layout" svg:width="15.239cm" svg:height="8.572cm" svg:x="1.905cm" svg:y="3.175cm" draw:page-number="6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7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1" draw:text-style-name="P9" draw:layer="layout" svg:width="23.113cm" svg:height="1.65cm" svg:x="1.397cm" svg:y="0.457cm">
          <text:p text:style-name="P8"><text:span text:style-name="T6">Diseño de Interfaces — Vista Detalle de Lib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2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3" draw:text-style-name="P3" draw:layer="layout" svg:width="1.269cm" svg:height="0.698cm" svg:x="23.876cm" svg:y="13.589cm">
          <text:p text:style-name="P2"><text:span text:style-name="T7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4" draw:text-style-name="P3" draw:layer="layout" svg:width="11.429cm" svg:height="0.812cm" svg:x="1.016cm" svg:y="2.413cm">
          <text:p text:style-name="P2"><text:span text:style-name="T19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11.429cm" svg:height="9.397cm" svg:x="1.016cm" svg:y="3.302cm">
          <draw:image xlink:href="Pictures/10000000000002CE00000326006908FC.jpg" xlink:type="simple" xlink:show="embed" xlink:actuate="onLoad" draw:mime-type="image/jpeg">
            <text:p/>
          </draw:image>
          <svg:desc>preencoded.png</svg:desc>
        </draw:frame>
        <draw:custom-shape draw:name="Text 7" draw:style-name="gr95" draw:text-style-name="P3" draw:layer="layout" svg:width="11.429cm" svg:height="0.812cm" svg:x="12.954cm" svg:y="2.413cm">
          <text:p text:style-name="P2"><text:span text:style-name="T20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6" draw:text-style-name="P10" draw:layer="layout" svg:width="11.429cm" svg:height="9.397cm" svg:x="12.954cm" svg:y="3.302cm">
          <draw:image xlink:href="Pictures/10000000000002730000027796D0B349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Slide Image Placeholder 1" draw:style-name="gr10" draw:layer="layout" svg:width="15.239cm" svg:height="8.572cm" svg:x="1.905cm" svg:y="3.175cm" draw:page-number="7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8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6" draw:text-style-name="P9" draw:layer="layout" svg:width="23.113cm" svg:height="1.65cm" svg:x="1.397cm" svg:y="0.457cm">
          <text:p text:style-name="P8"><text:span text:style-name="T6">Diseño de Interfaces — Panel de Administración (S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7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8" draw:text-style-name="P3" draw:layer="layout" svg:width="1.269cm" svg:height="0.698cm" svg:x="23.876cm" svg:y="13.589cm">
          <text:p text:style-name="P2"><text:span text:style-name="T7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9" draw:text-style-name="P3" draw:layer="layout" svg:width="11.429cm" svg:height="0.812cm" svg:x="1.016cm" svg:y="2.413cm">
          <text:p text:style-name="P2"><text:span text:style-name="T19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11.429cm" svg:height="9.397cm" svg:x="1.016cm" svg:y="3.302cm">
          <draw:image xlink:href="Pictures/10000000000002690000024771466199.jpg" xlink:type="simple" xlink:show="embed" xlink:actuate="onLoad" draw:mime-type="image/jpeg">
            <text:p/>
          </draw:image>
          <svg:desc>preencoded.png</svg:desc>
        </draw:frame>
        <draw:custom-shape draw:name="Text 7" draw:style-name="gr100" draw:text-style-name="P3" draw:layer="layout" svg:width="11.429cm" svg:height="0.812cm" svg:x="12.954cm" svg:y="2.413cm">
          <text:p text:style-name="P2"><text:span text:style-name="T20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6" draw:text-style-name="P10" draw:layer="layout" svg:width="11.429cm" svg:height="9.397cm" svg:x="12.954cm" svg:y="3.302cm">
          <draw:image xlink:href="Pictures/10000000000004F900000279A90F9BF4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Slide Image Placeholder 1" draw:style-name="gr10" draw:layer="layout" svg:width="15.239cm" svg:height="8.572cm" svg:x="1.905cm" svg:y="3.175cm" draw:page-number="8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9" draw:style-name="dp3" draw:master-page-name="DEFAULT">
        <office:forms form:automatic-focus="false" form:apply-design-mode="false"/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1" draw:text-style-name="P9" draw:layer="layout" svg:width="23.113cm" svg:height="1.65cm" svg:x="1.397cm" svg:y="0.457cm">
          <text:p text:style-name="P8"><text:span text:style-name="T6">Base de Da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2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3" draw:text-style-name="P3" draw:layer="layout" svg:width="1.269cm" svg:height="0.698cm" svg:x="23.876cm" svg:y="13.589cm">
          <text:p text:style-name="P2"><text:span text:style-name="T7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15.239cm" svg:height="9.905cm" svg:x="0.889cm" svg:y="2.413cm">
          <draw:image xlink:href="Pictures/100000010000200000001EC552695A35.png" xlink:type="simple" xlink:show="embed" xlink:actuate="onLoad" draw:mime-type="image/png">
            <text:p/>
          </draw:image>
          <svg:desc>preencoded.png</svg:desc>
        </draw:frame>
        <draw:custom-shape draw:name="Text 6" draw:style-name="gr104" draw:text-style-name="P9" draw:layer="layout" svg:width="7.873cm" svg:height="0.964cm" svg:x="16.637cm" svg:y="2.413cm">
          <text:p text:style-name="P8"><text:span text:style-name="T21">Tablas Princip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4" draw:text-style-name="P12" draw:layer="layout" svg:width="7.746cm" svg:height="1.117cm" svg:x="16.637cm" svg:y="3.55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5" draw:text-style-name="P9" draw:layer="layout" svg:width="7.365cm" svg:height="0.558cm" svg:x="16.967cm" svg:y="3.556cm">
          <text:p text:style-name="P8"><text:span text:style-name="T22">boo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6" draw:text-style-name="P9" draw:layer="layout" svg:width="7.365cm" svg:height="0.456cm" svg:x="16.967cm" svg:y="4.115cm">
          <text:p text:style-name="P8"><text:span text:style-name="T23">Catálogo: precio, stock, ISBN, port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4" draw:text-style-name="P12" draw:layer="layout" svg:width="7.746cm" svg:height="1.117cm" svg:x="16.637cm" svg:y="4.8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7" draw:text-style-name="P9" draw:layer="layout" svg:width="7.365cm" svg:height="0.558cm" svg:x="16.967cm" svg:y="4.877cm">
          <text:p text:style-name="P8"><text:span text:style-name="T22">custom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8" draw:text-style-name="P9" draw:layer="layout" svg:width="7.365cm" svg:height="0.456cm" svg:x="16.967cm" svg:y="5.436cm">
          <text:p text:style-name="P8"><text:span text:style-name="T23">Clientes con carrito en 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64" draw:text-style-name="P12" draw:layer="layout" svg:width="7.746cm" svg:height="1.117cm" svg:x="16.637cm" svg:y="6.1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9" draw:text-style-name="P9" draw:layer="layout" svg:width="7.365cm" svg:height="0.558cm" svg:x="16.967cm" svg:y="6.198cm">
          <text:p text:style-name="P8"><text:span text:style-name="T22">orders / order_ite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0" draw:text-style-name="P9" draw:layer="layout" svg:width="7.365cm" svg:height="0.456cm" svg:x="16.967cm" svg:y="6.756cm">
          <text:p text:style-name="P8"><text:span text:style-name="T23">Pedidos y líneas de detal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4" draw:text-style-name="P12" draw:layer="layout" svg:width="7.746cm" svg:height="1.117cm" svg:x="16.637cm" svg:y="7.5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1" draw:text-style-name="P9" draw:layer="layout" svg:width="7.365cm" svg:height="0.558cm" svg:x="16.967cm" svg:y="7.518cm">
          <text:p text:style-name="P8"><text:span text:style-name="T22">review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2" draw:text-style-name="P9" draw:layer="layout" svg:width="7.365cm" svg:height="0.456cm" svg:x="16.967cm" svg:y="8.077cm">
          <text:p text:style-name="P8"><text:span text:style-name="T23">Reseñas vinculadas a libro y cli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4" draw:text-style-name="P12" draw:layer="layout" svg:width="7.746cm" svg:height="1.117cm" svg:x="16.637cm" svg:y="8.8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3" draw:text-style-name="P9" draw:layer="layout" svg:width="7.365cm" svg:height="0.558cm" svg:x="16.967cm" svg:y="8.839cm">
          <text:p text:style-name="P8"><text:span text:style-name="T22">favori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4" draw:text-style-name="P9" draw:layer="layout" svg:width="7.365cm" svg:height="0.456cm" svg:x="16.967cm" svg:y="9.398cm">
          <text:p text:style-name="P8"><text:span text:style-name="T23">Tabla pivote cliente–lib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64" draw:text-style-name="P12" draw:layer="layout" svg:width="7.746cm" svg:height="1.117cm" svg:x="16.637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5" draw:text-style-name="P9" draw:layer="layout" svg:width="7.365cm" svg:height="0.558cm" svg:x="16.967cm" svg:y="10.16cm">
          <text:p text:style-name="P8"><text:span text:style-name="T22">coup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6" draw:text-style-name="P9" draw:layer="layout" svg:width="7.365cm" svg:height="0.456cm" svg:x="16.967cm" svg:y="10.719cm">
          <text:p text:style-name="P8"><text:span text:style-name="T23">Descuentos por códi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64" draw:text-style-name="P12" draw:layer="layout" svg:width="7.746cm" svg:height="1.117cm" svg:x="16.637cm" svg:y="11.4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7" draw:text-style-name="P9" draw:layer="layout" svg:width="7.365cm" svg:height="0.558cm" svg:x="16.967cm" svg:y="11.481cm">
          <text:p text:style-name="P8"><text:span text:style-name="T22">users / ro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8" draw:text-style-name="P9" draw:layer="layout" svg:width="7.365cm" svg:height="0.456cm" svg:x="16.967cm" svg:y="12.04cm">
          <text:p text:style-name="P8"><text:span text:style-name="T23">Administradores y permis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9" presentation:class="page"/>
          <draw:frame draw:name="Notes Placeholder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0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9" draw:text-style-name="P9" draw:layer="layout" svg:width="23.113cm" svg:height="1.65cm" svg:x="1.397cm" svg:y="0.457cm">
          <text:p text:style-name="P8"><text:span text:style-name="T6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0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1" draw:text-style-name="P3" draw:layer="layout" svg:width="1.269cm" svg:height="0.698cm" svg:x="23.876cm" svg:y="13.589cm">
          <text:p text:style-name="P2"><text:span text:style-name="T7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2" draw:text-style-name="P9" draw:layer="layout" svg:width="10.921cm" svg:height="0.913cm" svg:x="1.016cm" svg:y="2.54cm">
          <text:p text:style-name="P8"><text:span text:style-name="T14">Principios de Diseñ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3" draw:text-style-name="P18" draw:layer="layout" svg:width="11.175cm" svg:height="5.079cm" svg:x="1.016cm" svg:y="3.556cm">
          <text:list text:style-name="L8">
            <text:list-item>
              <text:p text:style-name="P17"><text:span text:style-name="T11">Prefijo uniforme: /api/v1/</text:span></text:p>
            </text:list-item>
            <text:list-item>
              <text:p text:style-name="P17"><text:span text:style-name="T11">Verbos HTTP estándar: GET · POST · PUT · DELETE</text:span></text:p>
            </text:list-item>
            <text:list-item>
              <text:p text:style-name="P17"><text:span text:style-name="T11">Respuestas JSON + paginación con objeto meta</text:span></text:p>
            </text:list-item>
            <text:list-item>
              <text:p text:style-name="P17"><text:span text:style-name="T11">Autenticación stateless: Bearer Token (Sanctum)</text:span></text:p>
            </text:list-item>
            <text:list-item>
              <text:p text:style-name="P17"><text:span text:style-name="T11">Sin estado en servidor entre peticion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4" draw:text-style-name="P9" draw:layer="layout" svg:width="11.429cm" svg:height="0.913cm" svg:x="12.954cm" svg:y="2.54cm">
          <text:p text:style-name="P8"><text:span text:style-name="T14">Endpoints Destac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9" draw:layer="layout" svg:width="11.556cm" svg:height="6.857cm" svg:x="12.827cm" svg:y="3.607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8"><text:span text:style-name="T24">Método</text:span></text:p>
              </table:table-cell>
              <table:table-cell>
                <text:p text:style-name="P8"><text:span text:style-name="T24">URL</text:span></text:p>
              </table:table-cell>
              <table:table-cell>
                <text:p text:style-name="P8"><text:span text:style-name="T24">Auth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POST</text:span></text:p>
              </table:table-cell>
              <table:table-cell>
                <text:p text:style-name="P8"><text:span text:style-name="T25">/api/v1/auth/login</text:span></text:p>
              </table:table-cell>
              <table:table-cell>
                <text:p text:style-name="P8"><text:span text:style-name="T25">No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GET</text:span></text:p>
              </table:table-cell>
              <table:table-cell>
                <text:p text:style-name="P8"><text:span text:style-name="T25">/api/v1/books</text:span></text:p>
              </table:table-cell>
              <table:table-cell>
                <text:p text:style-name="P8"><text:span text:style-name="T25">No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GET</text:span></text:p>
              </table:table-cell>
              <table:table-cell>
                <text:p text:style-name="P8"><text:span text:style-name="T25">/api/v1/books/{id}</text:span></text:p>
              </table:table-cell>
              <table:table-cell>
                <text:p text:style-name="P8"><text:span text:style-name="T25">No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POST</text:span></text:p>
              </table:table-cell>
              <table:table-cell>
                <text:p text:style-name="P8"><text:span text:style-name="T25">/api/v1/books</text:span></text:p>
              </table:table-cell>
              <table:table-cell>
                <text:p text:style-name="P8"><text:span text:style-name="T25">Admin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PUT</text:span></text:p>
              </table:table-cell>
              <table:table-cell>
                <text:p text:style-name="P8"><text:span text:style-name="T25">/api/v1/books/{id}</text:span></text:p>
              </table:table-cell>
              <table:table-cell>
                <text:p text:style-name="P8"><text:span text:style-name="T25">Admin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POST</text:span></text:p>
              </table:table-cell>
              <table:table-cell>
                <text:p text:style-name="P8"><text:span text:style-name="T25">/api/v1/orders</text:span></text:p>
              </table:table-cell>
              <table:table-cell>
                <text:p text:style-name="P8"><text:span text:style-name="T25">Cliente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GET</text:span></text:p>
              </table:table-cell>
              <table:table-cell>
                <text:p text:style-name="P8"><text:span text:style-name="T25">/api/v1/favorites</text:span></text:p>
              </table:table-cell>
              <table:table-cell>
                <text:p text:style-name="P8"><text:span text:style-name="T25">Cliente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25">POST</text:span></text:p>
              </table:table-cell>
              <table:table-cell>
                <text:p text:style-name="P8"><text:span text:style-name="T25">/api/v1/reviews</text:span></text:p>
              </table:table-cell>
              <table:table-cell>
                <text:p text:style-name="P8"><text:span text:style-name="T25">Client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0" draw:layer="layout" svg:width="15.239cm" svg:height="8.572cm" svg:x="1.905cm" svg:y="3.175cm" draw:page-number="10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1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5" draw:text-style-name="P9" draw:layer="layout" svg:width="23.113cm" svg:height="1.65cm" svg:x="1.397cm" svg:y="0.457cm">
          <text:p text:style-name="P8"><text:span text:style-name="T6">Funcionalidades Clave — Front Office (M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6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3" draw:layer="layout" svg:width="1.269cm" svg:height="0.698cm" svg:x="23.876cm" svg:y="13.589cm">
          <text:p text:style-name="P2"><text:span text:style-name="T7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1" draw:layer="layout" svg:width="7.619cm" svg:height="0.964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8" draw:text-style-name="P3" draw:layer="layout" svg:width="7.619cm" svg:height="0.964cm" svg:x="1.016cm" svg:y="2.54cm">
          <text:p text:style-name="P2"><text:span text:style-name="T26">Catálogo y Búsque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4" draw:text-style-name="P12" draw:layer="layout" svg:width="7.619cm" svg:height="7.111cm" svg:x="1.016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0.253cm" svg:height="0.253cm" svg:x="1.397cm" svg:y="4.1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9" draw:text-style-name="P9" draw:layer="layout" svg:width="6.476cm" svg:height="1.65cm" svg:x="1.829cm" svg:y="3.937cm">
          <text:p text:style-name="P8"><text:span text:style-name="T27">Búsqueda con debounce 400 ms (fetch por tecla cancelad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0.253cm" svg:height="0.253cm" svg:x="1.397cm" svg:y="6.27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0" draw:text-style-name="P9" draw:layer="layout" svg:width="6.476cm" svg:height="1.65cm" svg:x="1.829cm" svg:y="6.096cm">
          <text:p text:style-name="P8"><text:span text:style-name="T27">Filtro por categoría, precio y orden alfabét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" draw:text-style-name="P1" draw:layer="layout" svg:width="0.253cm" svg:height="0.253cm" svg:x="1.397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31" draw:text-style-name="P9" draw:layer="layout" svg:width="6.476cm" svg:height="1.65cm" svg:x="1.829cm" svg:y="8.255cm">
          <text:p text:style-name="P8"><text:span text:style-name="T27">Paginación dinámica generada desde meta del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3" draw:text-style-name="P11" draw:layer="layout" svg:width="7.619cm" svg:height="0.964cm" svg:x="9.017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2" draw:text-style-name="P3" draw:layer="layout" svg:width="7.619cm" svg:height="0.964cm" svg:x="9.017cm" svg:y="2.54cm">
          <text:p text:style-name="P2"><text:span text:style-name="T26">Carrito y Pedi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4" draw:text-style-name="P12" draw:layer="layout" svg:width="7.619cm" svg:height="7.111cm" svg:x="9.017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" draw:text-style-name="P1" draw:layer="layout" svg:width="0.253cm" svg:height="0.253cm" svg:x="9.398cm" svg:y="4.1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133" draw:text-style-name="P9" draw:layer="layout" svg:width="6.476cm" svg:height="1.65cm" svg:x="9.83cm" svg:y="3.937cm">
          <text:p text:style-name="P8"><text:span text:style-name="T27">Persistencia dual: localStorage + sincronización con B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" draw:text-style-name="P1" draw:layer="layout" svg:width="0.253cm" svg:height="0.253cm" svg:x="9.398cm" svg:y="6.27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34" draw:text-style-name="P9" draw:layer="layout" svg:width="6.476cm" svg:height="1.65cm" svg:x="9.83cm" svg:y="6.096cm">
          <text:p text:style-name="P8"><text:span text:style-name="T27">Gestión completa: añadir, modificar cantidad, elimin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" draw:text-style-name="P1" draw:layer="layout" svg:width="0.253cm" svg:height="0.253cm" svg:x="9.398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135" draw:text-style-name="P9" draw:layer="layout" svg:width="6.476cm" svg:height="1.65cm" svg:x="9.83cm" svg:y="8.255cm">
          <text:p text:style-name="P8"><text:span text:style-name="T27">Aplicación de cupones de descu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3" draw:text-style-name="P11" draw:layer="layout" svg:width="7.619cm" svg:height="0.964cm" svg:x="17.018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36" draw:text-style-name="P3" draw:layer="layout" svg:width="7.619cm" svg:height="0.964cm" svg:x="17.018cm" svg:y="2.54cm">
          <text:p text:style-name="P2"><text:span text:style-name="T26">Usuario y Segurid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4" draw:text-style-name="P12" draw:layer="layout" svg:width="7.619cm" svg:height="7.111cm" svg:x="17.018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" draw:text-style-name="P1" draw:layer="layout" svg:width="0.253cm" svg:height="0.253cm" svg:x="17.399cm" svg:y="4.1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137" draw:text-style-name="P9" draw:layer="layout" svg:width="6.476cm" svg:height="1.65cm" svg:x="17.831cm" svg:y="3.937cm">
          <text:p text:style-name="P8"><text:span text:style-name="T27">Registro, login y cierre de sesión con token Sanct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" draw:text-style-name="P1" draw:layer="layout" svg:width="0.253cm" svg:height="0.253cm" svg:x="17.399cm" svg:y="6.27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138" draw:text-style-name="P9" draw:layer="layout" svg:width="6.476cm" svg:height="1.65cm" svg:x="17.831cm" svg:y="6.096cm">
          <text:p text:style-name="P8"><text:span text:style-name="T27">Favoritos y reseñas de libros autenticad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" draw:text-style-name="P1" draw:layer="layout" svg:width="0.253cm" svg:height="0.253cm" svg:x="17.399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139" draw:text-style-name="P9" draw:layer="layout" svg:width="6.476cm" svg:height="1.65cm" svg:x="17.831cm" svg:y="8.255cm">
          <text:p text:style-name="P8"><text:span text:style-name="T27">Formulario de contacto con validación JS +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1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2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0" draw:text-style-name="P9" draw:layer="layout" svg:width="23.113cm" svg:height="1.65cm" svg:x="1.397cm" svg:y="0.457cm">
          <text:p text:style-name="P8"><text:span text:style-name="T6">Funcionalidades Clave — Back Office (S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1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2" draw:text-style-name="P3" draw:layer="layout" svg:width="1.269cm" svg:height="0.698cm" svg:x="23.876cm" svg:y="13.589cm">
          <text:p text:style-name="P2"><text:span text:style-name="T7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3" draw:text-style-name="P9" draw:layer="layout" svg:width="13.207cm" svg:height="0.964cm" svg:x="1.016cm" svg:y="2.54cm">
          <text:p text:style-name="P8"><text:span text:style-name="T14">Panel de Administ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4" draw:text-style-name="P18" draw:layer="layout" svg:width="13.207cm" svg:height="5.079cm" svg:x="1.016cm" svg:y="3.683cm">
          <text:list text:style-name="L8">
            <text:list-item>
              <text:p text:style-name="P17"><text:span text:style-name="T11">CRUD completo: libros, categorías, autores, editoriales, etiquetas</text:span></text:p>
            </text:list-item>
            <text:list-item>
              <text:p text:style-name="P17"><text:span text:style-name="T11">Gestión de clientes, pedidos y cupones de descuento</text:span></text:p>
            </text:list-item>
            <text:list-item>
              <text:p text:style-name="P17"><text:span text:style-name="T11">Visualización de reseñas y mensajes de contacto</text:span></text:p>
            </text:list-item>
            <text:list-item>
              <text:p text:style-name="P17"><text:span text:style-name="T11">Dashboard con estadísticas: libros totales, pedidos del mes, ingresos</text:span></text:p>
            </text:list-item>
            <text:list-item>
              <text:p text:style-name="P17"><text:span text:style-name="T11">Gráfica interactiva Pedidos vs Ingresos (Chart.js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5" draw:text-style-name="P9" draw:layer="layout" svg:width="13.207cm" svg:height="0.964cm" svg:x="1.016cm" svg:y="9.017cm">
          <text:p text:style-name="P8"><text:span text:style-name="T14">Enrutamiento SPA Prop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6" draw:text-style-name="P18" draw:layer="layout" svg:width="13.207cm" svg:height="2.285cm" svg:x="1.016cm" svg:y="10.084cm">
          <text:list text:style-name="L8">
            <text:list-item>
              <text:p text:style-name="P17"><text:span text:style-name="T11">Router.js propio sin librerías externas</text:span></text:p>
            </text:list-item>
            <text:list-item>
              <text:p text:style-name="P17"><text:span text:style-name="T11">Un único index.html — componentes cargados dinámicamente sin recarg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10" draw:layer="layout" svg:width="9.778cm" svg:height="7.365cm" svg:x="14.732cm" svg:y="2.54cm">
          <draw:image xlink:href="Pictures/10000000000004F900000279A90F9BF4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Slide Image Placeholder 1" draw:style-name="gr10" draw:layer="layout" svg:width="15.239cm" svg:height="8.572cm" svg:x="1.905cm" svg:y="3.175cm" draw:page-number="12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3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7" draw:text-style-name="P9" draw:layer="layout" svg:width="23.113cm" svg:height="1.65cm" svg:x="1.397cm" svg:y="0.457cm">
          <text:p text:style-name="P8"><text:span text:style-name="T6">Frontend — Técnicas Cla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8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9" draw:text-style-name="P3" draw:layer="layout" svg:width="1.269cm" svg:height="0.698cm" svg:x="23.876cm" svg:y="13.589cm">
          <text:p text:style-name="P2"><text:span text:style-name="T7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4" draw:text-style-name="P12" draw:layer="layout" svg:width="7.619cm" svg:height="4.317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7.619cm" svg:height="0.151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0" draw:text-style-name="P9" draw:layer="layout" svg:width="6.857cm" svg:height="1.066cm" svg:x="1.397cm" svg:y="2.794cm">
          <text:p text:style-name="P8"><text:span text:style-name="T28">Módulos ES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1" draw:text-style-name="P9" draw:layer="layout" svg:width="6.857cm" svg:height="2.539cm" svg:x="1.397cm" svg:y="3.937cm">
          <text:p text:style-name="P8"><text:span text:style-name="T29">import / export — código organizado por responsabilidad sin bund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4" draw:text-style-name="P12" draw:layer="layout" svg:width="7.619cm" svg:height="4.317cm" svg:x="9.017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7.619cm" svg:height="0.151cm" svg:x="9.017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2" draw:text-style-name="P9" draw:layer="layout" svg:width="6.857cm" svg:height="1.066cm" svg:x="9.398cm" svg:y="2.794cm">
          <text:p text:style-name="P8"><text:span text:style-name="T28">fetch + async/awa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3" draw:text-style-name="P9" draw:layer="layout" svg:width="6.857cm" svg:height="2.539cm" svg:x="9.398cm" svg:y="3.937cm">
          <text:p text:style-name="P8"><text:span text:style-name="T29">apiFetch() centraliza todas las llamadas con manejo de token y errores 4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4" draw:text-style-name="P12" draw:layer="layout" svg:width="7.619cm" svg:height="4.317cm" svg:x="17.018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7.619cm" svg:height="0.151cm" svg:x="17.018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4" draw:text-style-name="P9" draw:layer="layout" svg:width="6.857cm" svg:height="1.066cm" svg:x="17.399cm" svg:y="2.794cm">
          <text:p text:style-name="P8"><text:span text:style-name="T28">Debounce 400 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5" draw:text-style-name="P9" draw:layer="layout" svg:width="6.857cm" svg:height="2.539cm" svg:x="17.399cm" svg:y="3.937cm">
          <text:p text:style-name="P8"><text:span text:style-name="T29">clearTimeout + setTimeout evita saturar la API al escribir en el busc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64" draw:text-style-name="P12" draw:layer="layout" svg:width="7.619cm" svg:height="4.317cm" svg:x="1.016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7.619cm" svg:height="0.151cm" svg:x="1.016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6" draw:text-style-name="P9" draw:layer="layout" svg:width="6.857cm" svg:height="1.066cm" svg:x="1.397cm" svg:y="7.493cm">
          <text:p text:style-name="P8"><text:span text:style-name="T28">local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7" draw:text-style-name="P9" draw:layer="layout" svg:width="6.857cm" svg:height="2.539cm" svg:x="1.397cm" svg:y="8.636cm">
          <text:p text:style-name="P8"><text:span text:style-name="T29">Carrito, favoritos, token y datos de sesión persisten en el naveg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64" draw:text-style-name="P12" draw:layer="layout" svg:width="7.619cm" svg:height="4.317cm" svg:x="9.017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7.619cm" svg:height="0.151cm" svg:x="9.017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58" draw:text-style-name="P9" draw:layer="layout" svg:width="6.857cm" svg:height="1.066cm" svg:x="9.398cm" svg:y="7.493cm">
          <text:p text:style-name="P8"><text:span text:style-name="T28">Carrito Híbri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59" draw:text-style-name="P9" draw:layer="layout" svg:width="6.857cm" svg:height="2.539cm" svg:x="9.398cm" svg:y="8.636cm">
          <text:p text:style-name="P8"><text:span text:style-name="T29">Estado local en localStorage + sincronización con BD al hacer log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4" draw:text-style-name="P12" draw:layer="layout" svg:width="7.619cm" svg:height="4.317cm" svg:x="17.018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" draw:text-style-name="P1" draw:layer="layout" svg:width="7.619cm" svg:height="0.151cm" svg:x="17.018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60" draw:text-style-name="P9" draw:layer="layout" svg:width="6.857cm" svg:height="1.066cm" svg:x="17.399cm" svg:y="7.493cm">
          <text:p text:style-name="P8"><text:span text:style-name="T28">Validación 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61" draw:text-style-name="P9" draw:layer="layout" svg:width="6.857cm" svg:height="2.539cm" svg:x="17.399cm" svg:y="8.636cm">
          <text:p text:style-name="P8"><text:span text:style-name="T29">Formularios validados en cliente antes de enviar al backend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3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4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2" draw:text-style-name="P9" draw:layer="layout" svg:width="23.113cm" svg:height="1.65cm" svg:x="1.397cm" svg:y="0.457cm">
          <text:p text:style-name="P8"><text:span text:style-name="T6">Seguridad y Autent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3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4" draw:text-style-name="P3" draw:layer="layout" svg:width="1.269cm" svg:height="0.698cm" svg:x="23.876cm" svg:y="13.589cm">
          <text:p text:style-name="P2"><text:span text:style-name="T7">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5" draw:text-style-name="P9" draw:layer="layout" svg:width="23.367cm" svg:height="0.913cm" svg:x="1.016cm" svg:y="2.54cm">
          <text:p text:style-name="P8"><text:span text:style-name="T14">Flujo de Autenticación con Laravel Sanct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6" draw:text-style-name="P12" draw:layer="layout" svg:width="5.587cm" svg:height="2.285cm" svg:x="1.016cm" svg:y="3.81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167" draw:text-style-name="P3" draw:layer="layout" svg:width="5.206cm" svg:height="2.285cm" svg:x="1.219cm" svg:y="3.81cm">
          <text:p text:style-name="P2"><text:span text:style-name="T30">1 <text:s/>Cliente envía email + passw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66" draw:text-style-name="P12" draw:layer="layout" svg:width="5.587cm" svg:height="2.285cm" svg:x="6.985cm" svg:y="3.81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0" draw:style-name="gr168" draw:text-style-name="P3" draw:layer="layout" svg:width="5.206cm" svg:height="2.285cm" svg:x="7.188cm" svg:y="3.81cm">
          <text:p text:style-name="P2"><text:span text:style-name="T30">2 <text:s/>Backend valida credenci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66" draw:text-style-name="P12" draw:layer="layout" svg:width="5.587cm" svg:height="2.285cm" svg:x="12.954cm" svg:y="3.81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169" draw:text-style-name="P3" draw:layer="layout" svg:width="5.206cm" svg:height="2.285cm" svg:x="13.157cm" svg:y="3.81cm">
          <text:p text:style-name="P2"><text:span text:style-name="T30">3 <text:s/>Genera token de acceso pers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66" draw:text-style-name="P12" draw:layer="layout" svg:width="5.587cm" svg:height="2.285cm" svg:x="18.923cm" svg:y="3.81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4" draw:style-name="gr170" draw:text-style-name="P3" draw:layer="layout" svg:width="5.206cm" svg:height="2.285cm" svg:x="19.126cm" svg:y="3.81cm">
          <text:p text:style-name="P2"><text:span text:style-name="T30">4 <text:s/>Devuelve token en respuesta 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66" draw:text-style-name="P12" draw:layer="layout" svg:width="5.587cm" svg:height="2.285cm" svg:x="1cm" svg:y="7.215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171" draw:text-style-name="P3" draw:layer="layout" svg:width="5.206cm" svg:height="2.285cm" svg:x="1.219cm" svg:y="7.215cm">
          <text:p text:style-name="P2"><text:span text:style-name="T30">5 <text:s/>Frontend guarda token en local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66" draw:text-style-name="P12" draw:layer="layout" svg:width="5.587cm" svg:height="2.285cm" svg:x="6.985cm" svg:y="7.215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8" draw:style-name="gr172" draw:text-style-name="P3" draw:layer="layout" svg:width="5.206cm" svg:height="2.285cm" svg:x="7.17cm" svg:y="7.215cm">
          <text:p text:style-name="P2"><text:span text:style-name="T30">6 <text:s/>Cada petición adjunta: Authorization: Bearer &lt;token&gt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3" draw:text-style-name="P11" draw:layer="layout" svg:width="5.587cm" svg:height="2.285cm" svg:x="12.913cm" svg:y="7.215cm">
          <text:p/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0" draw:style-name="gr173" draw:text-style-name="P3" draw:layer="layout" svg:width="5.206cm" svg:height="2.285cm" svg:x="13.157cm" svg:y="7.215cm">
          <text:p text:style-name="P2"><text:span text:style-name="T31">7 <text:s/>Middleware auth:sanctum valida en cada requ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74" draw:text-style-name="P9" draw:layer="layout" svg:width="23.367cm" svg:height="0.761cm" svg:x="1cm" svg:y="10cm">
          <text:p text:style-name="P8"><text:span text:style-name="T12">Roles de Acce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9" draw:layer="layout" svg:width="23.367cm" svg:height="2.162cm" svg:x="0.855cm" svg:y="10.823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4">
              <table:table-cell>
                <text:p text:style-name="P8"><text:span text:style-name="T32">Sistema</text:span></text:p>
              </table:table-cell>
              <table:table-cell>
                <text:p text:style-name="P8"><text:span text:style-name="T32">Endpoint Login</text:span></text:p>
              </table:table-cell>
              <table:table-cell>
                <text:p text:style-name="P8"><text:span text:style-name="T32">Modelo</text:span></text:p>
              </table:table-cell>
              <table:table-cell>
                <text:p text:style-name="P8"><text:span text:style-name="T32">Rutas protegidas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16">Clientes</text:span></text:p>
              </table:table-cell>
              <table:table-cell>
                <text:p text:style-name="P8"><text:span text:style-name="T16">POST /api/v1/auth/login</text:span></text:p>
              </table:table-cell>
              <table:table-cell>
                <text:p text:style-name="P8"><text:span text:style-name="T16">Modelo Customer</text:span></text:p>
              </table:table-cell>
              <table:table-cell>
                <text:p text:style-name="P8"><text:span text:style-name="T16">Carrito · pedidos · favoritos · reseñas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16">Administradores</text:span></text:p>
              </table:table-cell>
              <table:table-cell>
                <text:p text:style-name="P8"><text:span text:style-name="T16">POST /api/v1/admin/login</text:span></text:p>
              </table:table-cell>
              <table:table-cell>
                <text:p text:style-name="P8"><text:span text:style-name="T16">Modelo User</text:span></text:p>
              </table:table-cell>
              <table:table-cell>
                <text:p text:style-name="P8"><text:span text:style-name="T16">CRUD completo del back offic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lide Image Placeholder 1" draw:style-name="gr10" draw:layer="layout" svg:width="15.239cm" svg:height="8.572cm" svg:x="1.905cm" svg:y="3.175cm" draw:page-number="14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5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5" draw:text-style-name="P9" draw:layer="layout" svg:width="23.113cm" svg:height="1.65cm" svg:x="1.397cm" svg:y="0.457cm">
          <text:p text:style-name="P8"><text:span text:style-name="T6">Uso de Inteligencia Artificial en el Desarrol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6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77" draw:text-style-name="P3" draw:layer="layout" svg:width="1.269cm" svg:height="0.698cm" svg:x="23.876cm" svg:y="13.589cm">
          <text:p text:style-name="P2"><text:span text:style-name="T7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1" draw:layer="layout" svg:width="7.619cm" svg:height="1.269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8" draw:text-style-name="P3" draw:layer="layout" svg:width="7.619cm" svg:height="0.71cm" svg:x="1.016cm" svg:y="2.54cm">
          <text:p text:style-name="P2"><text:span text:style-name="T33">Antigravity + Google Gemin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9" draw:text-style-name="P3" draw:layer="layout" svg:width="7.619cm" svg:height="0.558cm" svg:x="1.016cm" svg:y="3cm">
          <text:p text:style-name="P2"><text:span text:style-name="T34">Backend scaffol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4" draw:text-style-name="P12" draw:layer="layout" svg:width="7.619cm" svg:height="6.603cm" svg:x="1.016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0.278cm" svg:height="0.278cm" svg:x="1.473cm" svg:y="4.4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80" draw:text-style-name="P9" draw:layer="layout" svg:width="6.349cm" svg:height="1.65cm" svg:x="1.956cm" svg:y="4.242cm">
          <text:p text:style-name="P8"><text:span text:style-name="T27">Generación de modelos y migraciones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278cm" svg:height="0.278cm" svg:x="1.473cm" svg:y="6.4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81" draw:text-style-name="P9" draw:layer="layout" svg:width="6.349cm" svg:height="1.65cm" svg:x="1.956cm" svg:y="6.223cm">
          <text:p text:style-name="P8"><text:span text:style-name="T27">Scaffolding de controladores y rutas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0.278cm" svg:height="0.278cm" svg:x="1.473cm" svg:y="8.4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182" draw:text-style-name="P9" draw:layer="layout" svg:width="6.349cm" svg:height="1.65cm" svg:x="1.956cm" svg:y="8.204cm">
          <text:p text:style-name="P8"><text:span text:style-name="T27">Principal herramienta de desarrollo asistido del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3" draw:text-style-name="P11" draw:layer="layout" svg:width="7.619cm" svg:height="1.269cm" svg:x="9.017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83" draw:text-style-name="P3" draw:layer="layout" svg:width="7.619cm" svg:height="0.71cm" svg:x="9.017cm" svg:y="2.54cm">
          <text:p text:style-name="P2"><text:span text:style-name="T33">Claude (Anthropi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84" draw:text-style-name="P3" draw:layer="layout" svg:width="7.619cm" svg:height="0.558cm" svg:x="9.017cm" svg:y="3cm">
          <text:p text:style-name="P2"><text:span text:style-name="T34">Frontend + consultas 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4" draw:text-style-name="P12" draw:layer="layout" svg:width="7.619cm" svg:height="6.603cm" svg:x="9.017cm" svg:y="3.8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" draw:text-style-name="P1" draw:layer="layout" svg:width="0.278cm" svg:height="0.278cm" svg:x="9.474cm" svg:y="4.4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85" draw:text-style-name="P9" draw:layer="layout" svg:width="6.349cm" svg:height="1.65cm" svg:x="9.957cm" svg:y="4.242cm">
          <text:p text:style-name="P8"><text:span text:style-name="T27">Maquetación CSS del front off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" draw:text-style-name="P1" draw:layer="layout" svg:width="0.278cm" svg:height="0.278cm" svg:x="9.474cm" svg:y="6.4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186" draw:text-style-name="P9" draw:layer="layout" svg:width="6.349cm" svg:height="1.65cm" svg:x="9.957cm" svg:y="6.223cm">
          <text:p text:style-name="P8"><text:span text:style-name="T27">Patrones JS: módulos ES6, fetch, async/awa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" draw:text-style-name="P1" draw:layer="layout" svg:width="0.278cm" svg:height="0.278cm" svg:x="9.474cm" svg:y="8.4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187" draw:text-style-name="P9" draw:layer="layout" svg:width="6.349cm" svg:height="1.65cm" svg:x="9.957cm" svg:y="8.204cm">
          <text:p text:style-name="P8"><text:span text:style-name="T27">Resolución de dudas técn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3" draw:text-style-name="P11" draw:layer="layout" svg:width="7.619cm" svg:height="1.269cm" svg:x="17.018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88" draw:text-style-name="P3" draw:layer="layout" svg:width="7.619cm" svg:height="0.71cm" svg:x="17.018cm" svg:y="2.54cm">
          <text:p text:style-name="P2"><text:span text:style-name="T33">ChatGPT (OpenAI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89" draw:text-style-name="P3" draw:layer="layout" svg:width="7.619cm" svg:height="0.558cm" svg:x="17.018cm" svg:y="3cm">
          <text:p text:style-name="P2"><text:span text:style-name="T34">Soporte puntu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64" draw:text-style-name="P12" draw:layer="layout" svg:width="7.619cm" svg:height="6.603cm" svg:x="17.018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" draw:text-style-name="P1" draw:layer="layout" svg:width="0.278cm" svg:height="0.278cm" svg:x="17.475cm" svg:y="4.4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" draw:style-name="gr190" draw:text-style-name="P9" draw:layer="layout" svg:width="6.349cm" svg:height="1.65cm" svg:x="17.958cm" svg:y="4.242cm">
          <text:p text:style-name="P8"><text:span text:style-name="T27">Depuración de err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" draw:text-style-name="P1" draw:layer="layout" svg:width="0.278cm" svg:height="0.278cm" svg:x="17.475cm" svg:y="6.4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" draw:style-name="gr191" draw:text-style-name="P9" draw:layer="layout" svg:width="6.349cm" svg:height="1.65cm" svg:x="17.958cm" svg:y="6.223cm">
          <text:p text:style-name="P8"><text:span text:style-name="T27">Cuestiones de lógica específ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" draw:text-style-name="P1" draw:layer="layout" svg:width="0.278cm" svg:height="0.278cm" svg:x="17.475cm" svg:y="8.4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" draw:style-name="gr192" draw:text-style-name="P9" draw:layer="layout" svg:width="6.349cm" svg:height="1.65cm" svg:x="17.958cm" svg:y="8.204cm">
          <text:p text:style-name="P8"><text:span text:style-name="T27">Consultas ocasionales durante la integ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93" draw:text-style-name="P19" draw:layer="layout" svg:width="23.367cm" svg:height="1.828cm" svg:x="1.016cm" svg:y="10.9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94" draw:text-style-name="P9" draw:layer="layout" svg:width="22.859cm" svg:height="1.828cm" svg:x="1.397cm" svg:y="10.922cm">
          <text:p text:style-name="P8"><text:span text:style-name="T35">⚠ <text:s/>Todo el código generado fue revisado, comprendido y adaptado por el equipo antes de su integració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5" presentation:class="page"/>
          <draw:frame draw:name="Notes Placeholder 2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6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5" draw:text-style-name="P9" draw:layer="layout" svg:width="23.113cm" svg:height="1.65cm" svg:x="1.397cm" svg:y="0.457cm">
          <text:p text:style-name="P8"><text:span text:style-name="T6">Problemas Encontrados y Solu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96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7" draw:text-style-name="P3" draw:layer="layout" svg:width="1.269cm" svg:height="0.698cm" svg:x="23.876cm" svg:y="13.589cm">
          <text:p text:style-name="P2"><text:span text:style-name="T7">1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98" draw:text-style-name="P20" draw:layer="layout" svg:width="11.429cm" svg:height="3.25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99" draw:text-style-name="P21" draw:layer="layout" svg:width="11.429cm" svg:height="0.151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0" draw:text-style-name="P9" draw:layer="layout" svg:width="2.539cm" svg:height="0.558cm" svg:x="1.27cm" svg:y="2.743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01" draw:text-style-name="P9" draw:layer="layout" svg:width="10.794cm" svg:height="0.812cm" svg:x="1.27cm" svg:y="3.175cm">
          <text:p text:style-name="P8"><text:span text:style-name="T37">Curva de aprendizaje JS avanz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02" draw:text-style-name="P9" draw:layer="layout" svg:width="2.539cm" svg:height="0.558cm" svg:x="1.27cm" svg:y="4.064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03" draw:text-style-name="P9" draw:layer="layout" svg:width="10.794cm" svg:height="1.117cm" svg:x="1.27cm" svg:y="4.496cm">
          <text:p text:style-name="P8"><text:span text:style-name="T29">Módulos ES6, fetch, debounce implementados antes de que se impartieran en cl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98" draw:text-style-name="P20" draw:layer="layout" svg:width="11.429cm" svg:height="3.25cm" svg:x="13.081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99" draw:text-style-name="P21" draw:layer="layout" svg:width="11.429cm" svg:height="0.151cm" svg:x="13.081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04" draw:text-style-name="P9" draw:layer="layout" svg:width="2.539cm" svg:height="0.558cm" svg:x="13.335cm" svg:y="2.743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05" draw:text-style-name="P9" draw:layer="layout" svg:width="10.794cm" svg:height="0.812cm" svg:x="13.335cm" svg:y="3.175cm">
          <text:p text:style-name="P8"><text:span text:style-name="T37">Desbordamiento de trabajo C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06" draw:text-style-name="P9" draw:layer="layout" svg:width="2.539cm" svg:height="0.558cm" svg:x="13.335cm" svg:y="4.064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7" draw:text-style-name="P9" draw:layer="layout" svg:width="10.794cm" svg:height="1.117cm" svg:x="13.335cm" svg:y="4.496cm">
          <text:p text:style-name="P8"><text:span text:style-name="T29">Estrategia mixta: CSS manual + asistencia de Claude con instrucciones precis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98" draw:text-style-name="P20" draw:layer="layout" svg:width="11.429cm" svg:height="3.25cm" svg:x="1.016cm" svg:y="6.1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99" draw:text-style-name="P21" draw:layer="layout" svg:width="11.429cm" svg:height="0.151cm" svg:x="1.016cm" svg:y="6.1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08" draw:text-style-name="P9" draw:layer="layout" svg:width="2.539cm" svg:height="0.558cm" svg:x="1.27cm" svg:y="6.35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09" draw:text-style-name="P9" draw:layer="layout" svg:width="10.794cm" svg:height="0.812cm" svg:x="1.27cm" svg:y="6.782cm">
          <text:p text:style-name="P8"><text:span text:style-name="T37">Portadas de libros no cargaban tras conectar el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10" draw:text-style-name="P9" draw:layer="layout" svg:width="2.539cm" svg:height="0.558cm" svg:x="1.27cm" svg:y="7.671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11" draw:text-style-name="P9" draw:layer="layout" svg:width="10.794cm" svg:height="1.117cm" svg:x="1.27cm" svg:y="8.103cm">
          <text:p text:style-name="P8"><text:span text:style-name="T29">Rutas relativas almacenadas en BD; el frontend resuelve la URL completa al renderiz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98" draw:text-style-name="P20" draw:layer="layout" svg:width="11.429cm" svg:height="3.25cm" svg:x="13.081cm" svg:y="6.1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99" draw:text-style-name="P21" draw:layer="layout" svg:width="11.429cm" svg:height="0.151cm" svg:x="13.081cm" svg:y="6.1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12" draw:text-style-name="P9" draw:layer="layout" svg:width="2.539cm" svg:height="0.558cm" svg:x="13.335cm" svg:y="6.35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13" draw:text-style-name="P9" draw:layer="layout" svg:width="10.794cm" svg:height="0.812cm" svg:x="13.335cm" svg:y="6.782cm">
          <text:p text:style-name="P8"><text:span text:style-name="T37">IA modificó los títulos de los libros al latí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14" draw:text-style-name="P9" draw:layer="layout" svg:width="2.539cm" svg:height="0.558cm" svg:x="13.335cm" svg:y="7.671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15" draw:text-style-name="P9" draw:layer="layout" svg:width="10.794cm" svg:height="1.117cm" svg:x="13.335cm" svg:y="8.103cm">
          <text:p text:style-name="P8"><text:span text:style-name="T29">Se restauraron con el agente de IA los títulos correctos en la base de datos restringiendo sus movimien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98" draw:text-style-name="P20" draw:layer="layout" svg:width="11.429cm" svg:height="3.25cm" svg:x="1.016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99" draw:text-style-name="P21" draw:layer="layout" svg:width="11.429cm" svg:height="0.151cm" svg:x="1.016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16" draw:text-style-name="P9" draw:layer="layout" svg:width="2.539cm" svg:height="0.558cm" svg:x="1.27cm" svg:y="9.957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17" draw:text-style-name="P9" draw:layer="layout" svg:width="10.794cm" svg:height="0.812cm" svg:x="1.27cm" svg:y="10.389cm">
          <text:p text:style-name="P8"><text:span text:style-name="T37">Reducción del equipo (de 4 a 2 persona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18" draw:text-style-name="P9" draw:layer="layout" svg:width="2.539cm" svg:height="0.558cm" svg:x="1.27cm" svg:y="11.278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19" draw:text-style-name="P9" draw:layer="layout" svg:width="10.794cm" svg:height="1.117cm" svg:x="1.27cm" svg:y="11.709cm">
          <text:p text:style-name="P8"><text:span text:style-name="T29">Redistribución eficaz: Tomás lideró backend, Richard la integración y err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98" draw:text-style-name="P20" draw:layer="layout" svg:width="11.429cm" svg:height="3.25cm" svg:x="13.081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99" draw:text-style-name="P21" draw:layer="layout" svg:width="11.429cm" svg:height="0.151cm" svg:x="13.081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20" draw:text-style-name="P9" draw:layer="layout" svg:width="2.539cm" svg:height="0.558cm" svg:x="13.335cm" svg:y="9.957cm">
          <text:p text:style-name="P8"><text:span text:style-name="T36">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221" draw:text-style-name="P9" draw:layer="layout" svg:width="10.794cm" svg:height="0.812cm" svg:x="13.335cm" svg:y="10.389cm">
          <text:p text:style-name="P8"><text:span text:style-name="T37">Saturación de la API por el busc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22" draw:text-style-name="P9" draw:layer="layout" svg:width="2.539cm" svg:height="0.558cm" svg:x="13.335cm" svg:y="11.278cm">
          <text:p text:style-name="P8"><text:span text:style-name="T38">Sol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223" draw:text-style-name="P9" draw:layer="layout" svg:width="10.794cm" svg:height="1.117cm" svg:x="13.335cm" svg:y="11.709cm">
          <text:p text:style-name="P8"><text:span text:style-name="T29">Debounce 400 ms: clearTimeout cancela la petición anterior antes de lanzar la nue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6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7" draw:style-name="dp3" draw:master-page-name="DEFAULT">
        <draw:custom-shape draw:name="Shape 0" draw:style-name="gr1" draw:text-style-name="P1" draw:layer="layout" svg:width="0.151cm" svg:height="1.396cm" svg:x="1.016cm" svg:y="0.5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4" draw:text-style-name="P9" draw:layer="layout" svg:width="23.113cm" svg:height="1.65cm" svg:x="1.397cm" svg:y="0.457cm">
          <text:p text:style-name="P8"><text:span text:style-name="T6">Conclusión y Mejoras Futu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10" draw:layer="layout" svg:x1="1.016cm" svg:y1="2.159cm" svg:x2="24.384cm" svg:y2="2.16cm">
          <text:p/>
        </draw:line>
        <draw:custom-shape draw:name="Shape 3" draw:style-name="gr13" draw:text-style-name="P11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25" draw:text-style-name="P9" draw:layer="layout" svg:width="17.779cm" svg:height="0.698cm" svg:x="0.762cm" svg:y="13.589cm">
          <text:p text:style-name="P8"><text:span text:style-name="T7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6" draw:text-style-name="P3" draw:layer="layout" svg:width="1.269cm" svg:height="0.698cm" svg:x="23.876cm" svg:y="13.589cm">
          <text:p text:style-name="P2"><text:span text:style-name="T7">1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0.151cm" svg:height="0.888cm" svg:x="1.0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27" draw:text-style-name="P9" draw:layer="layout" svg:width="10.921cm" svg:height="0.888cm" svg:x="1.422cm" svg:y="2.54cm">
          <text:p text:style-name="P8"><text:span text:style-name="T14">Conclus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28" draw:text-style-name="P18" draw:layer="layout" svg:width="11.429cm" svg:height="5.587cm" svg:x="1.016cm" svg:y="3.913cm">
          <text:list text:style-name="L8">
            <text:list-item>
              <text:p text:style-name="P17"><text:span text:style-name="T11">Aplicación funcional con arquitectura desacoplada real</text:span></text:p>
            </text:list-item>
            <text:list-item>
              <text:p text:style-name="P17"><text:span text:style-name="T11">API REST completa: autenticación, CRUD, paginación, filtros</text:span></text:p>
            </text:list-item>
            <text:list-item>
              <text:p text:style-name="P17"><text:span text:style-name="T11">Dominio práctico de MPA vs SPA sin frameworks</text:span></text:p>
            </text:list-item>
            <text:list-item>
              <text:p text:style-name="P17"><text:span text:style-name="T11">Uso responsable y supervisado de herramientas de IA</text:span></text:p>
            </text:list-item>
            <text:list-item>
              <text:p text:style-name="P17"><text:span text:style-name="T11">Base sólida para proyectos profesionales en e-commerc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5" draw:text-style-name="P16" draw:layer="layout" svg:width="0.075cm" svg:height="8.381cm" svg:x="13.081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29" draw:text-style-name="P22" draw:layer="layout" svg:width="0.151cm" svg:height="0.888cm" svg:x="13.716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0" draw:text-style-name="P9" draw:layer="layout" svg:width="10.159cm" svg:height="0.888cm" svg:x="14.122cm" svg:y="2.54cm">
          <text:p text:style-name="P8"><text:span text:style-name="T14">Mejoras Futu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1" draw:text-style-name="P18" draw:layer="layout" svg:width="10.667cm" svg:height="6.603cm" svg:x="13.716cm" svg:y="3.897cm">
          <text:list text:style-name="L8">
            <text:list-item>
              <text:p text:style-name="P17"><text:span text:style-name="T11">Pasarela de pago real: Stripe o Redsys / TPV Virtual</text:span></text:p>
            </text:list-item>
            <text:list-item>
              <text:p text:style-name="P17"><text:span text:style-name="T11">Mailing transaccional: confirmación de pedido y reset de contraseña</text:span></text:p>
            </text:list-item>
            <text:list-item>
              <text:p text:style-name="P17"><text:span text:style-name="T11">Inicio de sesión con Google (OAuth 2.0)</text:span></text:p>
            </text:list-item>
            <text:list-item>
              <text:p text:style-name="P17"><text:span text:style-name="T11">Restricción de CORS en producción + cabeceras de seguridad HTTP</text:span></text:p>
            </text:list-item>
            <text:list-item>
              <text:p text:style-name="P17"><text:span text:style-name="T11">FormRequest Laravel — eliminar riesgo de mass assignment</text:span></text:p>
            </text:list-item>
            <text:list-item>
              <text:p text:style-name="P17"><text:span text:style-name="T11">Módulos de facturación y exportación de informes en el pane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3" draw:text-style-name="P11" draw:layer="layout" svg:width="23.367cm" svg:height="1.777cm" svg:x="1.016cm" svg:y="11.3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2" draw:text-style-name="P3" draw:layer="layout" svg:width="22.859cm" svg:height="1.777cm" svg:x="1.397cm" svg:y="11.303cm">
          <text:p text:style-name="P2"><text:span text:style-name="T39">"Integración práctica de todos los conocimientos del módulo en un entorno realista de desarrollo web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7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Slide 18" draw:style-name="dp1" draw:master-page-name="DEFAULT">
        <draw:custom-shape draw:name="Shape 0" draw:style-name="gr1" draw:text-style-name="P1" draw:layer="layout" svg:width="25.399cm" svg:height="0.30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317cm" svg:x="0cm" svg:y="13.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3" draw:text-style-name="P3" draw:layer="layout" svg:width="22.859cm" svg:height="3.555cm" svg:x="1.27cm" svg:y="3.556cm">
          <text:p text:style-name="P2"><text:span text:style-name="T40">¡Gracias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4" draw:text-style-name="P3" draw:layer="layout" svg:width="22.859cm" svg:height="1.523cm" svg:x="1.27cm" svg:y="7.62cm">
          <text:p text:style-name="P2"><text:span text:style-name="T41">Richard · Tomá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5" draw:text-style-name="P3" draw:layer="layout" svg:width="22.859cm" svg:height="1.142cm" svg:x="1.27cm" svg:y="9.398cm">
          <text:p text:style-name="P2"><text:span text:style-name="T4">Clon de Agapea — Plataforma de Venta de Libros Online <text:s/>| <text:s/>ASIR -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8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lon de Agapea</dc:title>
    <dc:subject>PptxGenJS Presentation</dc:subject>
    <meta:initial-creator>Richard &amp; Tomás</meta:initial-creator>
    <meta:editing-cycles>2</meta:editing-cycles>
    <meta:creation-date>2026-05-06T10:15:04</meta:creation-date>
    <dc:date>2026-05-06T16:02:08.822219400</dc:date>
    <meta:editing-duration>PT15M45S</meta:editing-duration>
    <meta:generator>LibreOffice/25.8.5.2$Windows_X86_64 LibreOffice_project/9c8b85f387cc00a89945a79c9e6239f32e450ac2</meta:generator>
    <meta:document-statistic meta:object-count="468"/>
    <meta:user-defined meta:name="AppVersion">16.0000</meta:user-defined>
    <meta:user-defined meta:name="Company">PptxGenJS</meta:user-defined>
    <meta:user-defined meta:name="Notes" meta:value-type="float">18</meta:user-defined>
    <meta:user-defined meta:name="PresentationFormat">On-screen Show (16:9)</meta:user-defined>
    <meta:user-defined meta:name="Slides" meta:value-type="float">18</meta:user-defined>
  </office:meta>
</office:document-meta>
</file>