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CE00000326006908FC.jpg" manifest:media-type="image/jpeg"/>
  <manifest:file-entry manifest:full-path="Pictures/TablePreview1.svm" manifest:media-type=""/>
  <manifest:file-entry manifest:full-path="Pictures/1000000000000347000001AB01A6D5F1.jpg" manifest:media-type="image/jpeg"/>
  <manifest:file-entry manifest:full-path="Pictures/10000000000002690000024771466199.jpg" manifest:media-type="image/jpeg"/>
  <manifest:file-entry manifest:full-path="Pictures/10000000000002CF00000313D661C2F3.jpg" manifest:media-type="image/jpeg"/>
  <manifest:file-entry manifest:full-path="Pictures/100000000000027200000273AE34944E.jpg" manifest:media-type="image/jpeg"/>
  <manifest:file-entry manifest:full-path="Pictures/10000000000002730000027796D0B349.jpg" manifest:media-type="image/jpeg"/>
  <manifest:file-entry manifest:full-path="Pictures/10000000000004F900000279A90F9BF4.jpg" manifest:media-type="image/jpeg"/>
  <manifest:file-entry manifest:full-path="Pictures/100000010000200000001EC552695A35.png" manifest:media-type="image/png"/>
  <manifest:file-entry manifest:full-path="Pictures/TablePreview2.svm" manifest:media-type=""/>
  <manifest:file-entry manifest:full-path="Pictures/TablePreview3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ea" svg:font-family="+mn-ea"/>
    <style:font-face style:name="+mn-lt" svg:font-family="+mn-lt"/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a2744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c9973a" draw:stroke-linejoin="round" draw:fill="solid" draw:fill-color="#c9973a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" style:family="graphic" style:parent-style-name="standard">
      <style:graphic-properties draw:stroke="solid" svg:stroke-width="0.035cm" svg:stroke-color="#c9973a" draw:stroke-linejoin="round" draw:fill="solid" draw:fill-color="#223366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" style:family="graphic">
      <style:graphic-properties style:protect="size" loext:decorative="false"/>
    </style:style>
    <style:style style:name="gr1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" style:family="graphic" style:parent-style-name="standard">
      <style:graphic-properties draw:stroke="solid" svg:stroke-width="0.042cm" svg:stroke-color="#e8edf7" draw:stroke-linejoin="round" draw:fill="none" loext:fill-use-slide-background="false" draw:textarea-horizontal-align="center" draw:textarea-vertical-align="top" draw:auto-grow-height="false" draw:fit-to-size="false" style:shrink-to-fit="false" fo:padding-top="-0.124cm" fo:padding-bottom="-0.124cm" fo:padding-left="0.25cm" fo:padding-right="0.25cm" fo:wrap-option="wrap" loext:decorative="false"/>
    </style:style>
    <style:style style:name="gr13" style:family="graphic" style:parent-style-name="standard">
      <style:graphic-properties draw:stroke="solid" svg:stroke-width="0.025cm" svg:stroke-color="#e8edf7" draw:stroke-linejoin="round" draw:fill="solid" draw:fill-color="#f4f6fb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" style:family="graphic" style:parent-style-name="standard">
      <style:graphic-properties draw:stroke="none" svg:stroke-width="0cm" draw:fill="solid" draw:fill-color="#7b8bb2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.125cm" fo:padding-right="0.125cm" fo:wrap-option="wrap" loext:decorative="false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.125cm" fo:padding-right="0.125cm" fo:wrap-option="wrap" loext:decorative="false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.125cm" fo:padding-right="0.125cm" fo:wrap-option="wrap" loext:decorative="false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.125cm" fo:padding-right="0.125cm" fo:wrap-option="wrap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.125cm" fo:padding-right="0.125cm" fo:wrap-option="wrap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.125cm" fo:padding-right="0.125cm" fo:wrap-option="wrap" loext:decorative="false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.125cm" fo:padding-right="0.125cm" fo:wrap-option="wrap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.125cm" fo:padding-right="0.125cm" fo:wrap-option="wrap" loext:decorative="false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.125cm" fo:padding-right="0.125cm" fo:wrap-option="wrap" loext:decorative="false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.125cm" fo:padding-right="0.125cm" fo:wrap-option="wrap" loext:decorative="false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.125cm" fo:padding-right="0.125cm" fo:wrap-option="wrap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.125cm" fo:padding-right="0.125cm" fo:wrap-option="wrap" loext:decorative="false"/>
      <style:paragraph-properties style:writing-mode="lr-tb"/>
    </style:style>
    <style:style style:name="gr39" style:family="graphic" style:parent-style-name="standard">
      <style:graphic-properties draw:stroke="solid" svg:stroke-width="0.035cm" svg:stroke-color="#1a2744" draw:stroke-linejoin="round" draw:fill="solid" draw:fill-color="#1a2744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4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9" style:family="graphic" style:parent-style-name="standard">
      <style:graphic-properties draw:stroke="solid" svg:stroke-width="0.035cm" svg:stroke-color="#e8edf7" draw:stroke-linejoin="round" draw:fill="solid" draw:fill-color="#e8edf7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5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1" style:family="graphic" style:parent-style-name="standard">
      <style:graphic-properties draw:stroke="solid" svg:stroke-width="0.035cm" svg:stroke-color="#e8edf7" draw:stroke-linejoin="round" draw:fill="solid" draw:fill-color="#f4f6fb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5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3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7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9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6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125cm" fo:padding-right="0.125cm" fo:wrap-option="wrap" loext:decorative="false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solid" draw:fill-color="#1e8449" draw:textarea-horizontal-align="justify" draw:textarea-vertical-align="middle" draw:auto-grow-height="false" draw:fit-to-size="false" style:shrink-to-fit="false" fo:min-height="0cm" fo:min-width="0cm" fo:padding-top="0cm" fo:padding-bottom="0cm" fo:padding-left="0.125cm" fo:padding-right="0.125cm" fo:wrap-option="wrap" loext:decorative="false"/>
      <style:paragraph-properties style:writing-mode="lr-tb"/>
    </style:style>
    <style:style style:name="gr6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125cm" fo:padding-right="0.125cm" fo:wrap-option="wrap" loext:decorative="false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draw:fill="solid" draw:fill-color="#1e8449" draw:textarea-horizontal-align="justify" draw:textarea-vertical-align="middle" draw:auto-grow-height="false" draw:fit-to-size="false" style:shrink-to-fit="false" fo:min-height="0cm" fo:min-width="0cm" fo:padding-top="0cm" fo:padding-bottom="0cm" fo:padding-left="0.125cm" fo:padding-right="0.125cm" fo:wrap-option="wrap" loext:decorative="false"/>
      <style:paragraph-properties style:writing-mode="lr-tb"/>
    </style:style>
    <style:style style:name="gr6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125cm" fo:padding-right="0.125cm" fo:wrap-option="wrap" loext:decorative="false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solid" draw:fill-color="#1e8449" draw:textarea-horizontal-align="justify" draw:textarea-vertical-align="middle" draw:auto-grow-height="false" draw:fit-to-size="false" style:shrink-to-fit="false" fo:min-height="0cm" fo:min-width="0cm" fo:padding-top="0cm" fo:padding-bottom="0cm" fo:padding-left="0.125cm" fo:padding-right="0.125cm" fo:wrap-option="wrap" loext:decorative="false"/>
      <style:paragraph-properties style:writing-mode="lr-tb"/>
    </style:style>
    <style:style style:name="gr6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125cm" fo:padding-right="0.125cm" fo:wrap-option="wrap" loext:decorative="false"/>
      <style:paragraph-properties style:writing-mode="lr-tb"/>
    </style:style>
    <style:style style:name="gr67" style:family="graphic" style:parent-style-name="standard" style:list-style-name="L2">
      <style:graphic-properties draw:stroke="none" svg:stroke-width="0cm" draw:fill="solid" draw:fill-color="#1e8449" draw:textarea-horizontal-align="justify" draw:textarea-vertical-align="middle" draw:auto-grow-height="false" draw:fit-to-size="false" style:shrink-to-fit="false" fo:min-height="0cm" fo:min-width="0cm" fo:padding-top="0cm" fo:padding-bottom="0cm" fo:padding-left="0.125cm" fo:padding-right="0.125cm" fo:wrap-option="wrap" loext:decorative="false"/>
      <style:paragraph-properties style:writing-mode="lr-tb"/>
    </style:style>
    <style:style style:name="gr6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125cm" fo:padding-right="0.125cm" fo:wrap-option="wrap" loext:decorative="false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draw:fill="solid" draw:fill-color="#1e8449" draw:textarea-horizontal-align="justify" draw:textarea-vertical-align="middle" draw:auto-grow-height="false" draw:fit-to-size="false" style:shrink-to-fit="false" fo:min-height="0cm" fo:min-width="0cm" fo:padding-top="0cm" fo:padding-bottom="0cm" fo:padding-left="0.125cm" fo:padding-right="0.125cm" fo:wrap-option="wrap" loext:decorative="false"/>
      <style:paragraph-properties style:writing-mode="lr-tb"/>
    </style:style>
    <style:style style:name="gr7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125cm" fo:padding-right="0.125cm" fo:wrap-option="wrap" loext:decorative="false"/>
      <style:paragraph-properties style:writing-mode="lr-tb"/>
    </style:style>
    <style:style style:name="gr71" style:family="graphic" style:parent-style-name="standard" style:list-style-name="L2">
      <style:graphic-properties draw:stroke="none" svg:stroke-width="0cm" draw:fill="solid" draw:fill-color="#1e8449" draw:textarea-horizontal-align="justify" draw:textarea-vertical-align="middle" draw:auto-grow-height="false" draw:fit-to-size="false" style:shrink-to-fit="false" fo:min-height="0cm" fo:min-width="0cm" fo:padding-top="0cm" fo:padding-bottom="0cm" fo:padding-left="0.125cm" fo:padding-right="0.125cm" fo:wrap-option="wrap" loext:decorative="false"/>
      <style:paragraph-properties style:writing-mode="lr-tb"/>
    </style:style>
    <style:style style:name="gr7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125cm" fo:padding-right="0.125cm" fo:wrap-option="wrap" loext:decorative="false"/>
      <style:paragraph-properties style:writing-mode="lr-tb"/>
    </style:style>
    <style:style style:name="gr73" style:family="graphic" style:parent-style-name="standard" style:list-style-name="L2">
      <style:graphic-properties draw:stroke="none" svg:stroke-width="0cm" draw:fill="solid" draw:fill-color="#1e8449" draw:textarea-horizontal-align="justify" draw:textarea-vertical-align="middle" draw:auto-grow-height="false" draw:fit-to-size="false" style:shrink-to-fit="false" fo:min-height="0cm" fo:min-width="0cm" fo:padding-top="0cm" fo:padding-bottom="0cm" fo:padding-left="0.125cm" fo:padding-right="0.125cm" fo:wrap-option="wrap" loext:decorative="false"/>
      <style:paragraph-properties style:writing-mode="lr-tb"/>
    </style:style>
    <style:style style:name="gr7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125cm" fo:padding-right="0.125cm" fo:wrap-option="wrap" loext:decorative="false"/>
      <style:paragraph-properties style:writing-mode="lr-tb"/>
    </style:style>
    <style:style style:name="gr75" style:family="graphic" style:parent-style-name="standard" style:list-style-name="L2">
      <style:graphic-properties draw:stroke="none" svg:stroke-width="0cm" draw:fill="solid" draw:fill-color="#1e8449" draw:textarea-horizontal-align="justify" draw:textarea-vertical-align="middle" draw:auto-grow-height="false" draw:fit-to-size="false" style:shrink-to-fit="false" fo:min-height="0cm" fo:min-width="0cm" fo:padding-top="0cm" fo:padding-bottom="0cm" fo:padding-left="0.125cm" fo:padding-right="0.125cm" fo:wrap-option="wrap" loext:decorative="false"/>
      <style:paragraph-properties style:writing-mode="lr-tb"/>
    </style:style>
    <style:style style:name="gr7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125cm" fo:padding-right="0.125cm" fo:wrap-option="wrap" loext:decorative="false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draw:fill="solid" draw:fill-color="#1e8449" draw:textarea-horizontal-align="justify" draw:textarea-vertical-align="middle" draw:auto-grow-height="false" draw:fit-to-size="false" style:shrink-to-fit="false" fo:min-height="0cm" fo:min-width="0cm" fo:padding-top="0cm" fo:padding-bottom="0cm" fo:padding-left="0.125cm" fo:padding-right="0.125cm" fo:wrap-option="wrap" loext:decorative="false"/>
      <style:paragraph-properties style:writing-mode="lr-tb"/>
    </style:style>
    <style:style style:name="gr7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125cm" fo:padding-right="0.125cm" fo:wrap-option="wrap" loext:decorative="false"/>
      <style:paragraph-properties style:writing-mode="lr-tb"/>
    </style:style>
    <style:style style:name="gr79" style:family="graphic" style:parent-style-name="standard" style:list-style-name="L2">
      <style:graphic-properties draw:stroke="none" svg:stroke-width="0cm" draw:fill="solid" draw:fill-color="#1e8449" draw:textarea-horizontal-align="justify" draw:textarea-vertical-align="middle" draw:auto-grow-height="false" draw:fit-to-size="false" style:shrink-to-fit="false" fo:min-height="0cm" fo:min-width="0cm" fo:padding-top="0cm" fo:padding-bottom="0cm" fo:padding-left="0.125cm" fo:padding-right="0.125cm" fo:wrap-option="wrap" loext:decorative="false"/>
      <style:paragraph-properties style:writing-mode="lr-tb"/>
    </style:style>
    <style:style style:name="gr8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7" style:family="graphic" style:parent-style-name="standard">
      <style:graphic-properties loext:decorative="false"/>
    </style:style>
    <style:style style:name="gr8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0" style:family="graphic" style:parent-style-name="standard" style:list-style-name="L2">
      <style:graphic-properties draw:stroke="none" svg:stroke-width="0cm" draw:fill="solid" draw:fill-color="#065a82" draw:textarea-horizontal-align="justify" draw:textarea-vertical-align="middle" draw:auto-grow-height="false" draw:fit-to-size="false" style:shrink-to-fit="false" fo:min-height="0cm" fo:min-width="0cm" fo:padding-top="0cm" fo:padding-bottom="0cm" fo:padding-left="0.336cm" fo:padding-right="0.25cm" fo:wrap-option="wrap" loext:decorative="false"/>
      <style:paragraph-properties style:writing-mode="lr-tb"/>
    </style:style>
    <style:style style:name="gr91" style:family="graphic" style:parent-style-name="standard" style:list-style-name="L2">
      <style:graphic-properties draw:stroke="none" svg:stroke-width="0cm" draw:fill="solid" draw:fill-color="#1a4d2e" draw:textarea-horizontal-align="justify" draw:textarea-vertical-align="middle" draw:auto-grow-height="false" draw:fit-to-size="false" style:shrink-to-fit="false" fo:min-height="0cm" fo:min-width="0cm" fo:padding-top="0cm" fo:padding-bottom="0cm" fo:padding-left="0.336cm" fo:padding-right="0.25cm" fo:wrap-option="wrap" loext:decorative="false"/>
      <style:paragraph-properties style:writing-mode="lr-tb"/>
    </style:style>
    <style:style style:name="gr9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9cm" fo:padding-bottom="0.083cm" fo:padding-left="0.125cm" fo:padding-right="0.125cm" fo:wrap-option="wrap" loext:decorative="false"/>
      <style:paragraph-properties style:writing-mode="lr-tb"/>
    </style:style>
    <style:style style:name="gr9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9cm" fo:padding-bottom="0.083cm" fo:padding-left="0.125cm" fo:padding-right="0.125cm" fo:wrap-option="wrap" loext:decorative="false"/>
      <style:paragraph-properties style:writing-mode="lr-tb"/>
    </style:style>
    <style:style style:name="gr9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9cm" fo:padding-bottom="0.083cm" fo:padding-left="0.125cm" fo:padding-right="0.125cm" fo:wrap-option="wrap" loext:decorative="false"/>
      <style:paragraph-properties style:writing-mode="lr-tb"/>
    </style:style>
    <style:style style:name="gr9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9cm" fo:padding-bottom="0.083cm" fo:padding-left="0.125cm" fo:padding-right="0.125cm" fo:wrap-option="wrap" loext:decorative="false"/>
      <style:paragraph-properties style:writing-mode="lr-tb"/>
    </style:style>
    <style:style style:name="gr9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9cm" fo:padding-bottom="0.083cm" fo:padding-left="0.125cm" fo:padding-right="0.125cm" fo:wrap-option="wrap" loext:decorative="false"/>
      <style:paragraph-properties style:writing-mode="lr-tb"/>
    </style:style>
    <style:style style:name="gr97" style:family="graphic" style:parent-style-name="standard" style:list-style-name="L1">
      <style:graphic-properties draw:stroke="solid" svg:stroke-width="0.025cm" svg:stroke-color="#e8edf7" draw:stroke-linejoin="round" draw:fill="solid" draw:fill-color="#f4f6fb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9cm" fo:padding-bottom="0.083cm" fo:padding-left="0.125cm" fo:padding-right="0.125cm" fo:wrap-option="wrap" loext:decorative="false"/>
      <style:paragraph-properties style:writing-mode="lr-tb"/>
    </style:style>
    <style:style style:name="gr9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9cm" fo:padding-bottom="0.083cm" fo:padding-left="0.125cm" fo:padding-right="0.125cm" fo:wrap-option="wrap" loext:decorative="false"/>
      <style:paragraph-properties style:writing-mode="lr-tb"/>
    </style:style>
    <style:style style:name="gr10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9cm" fo:padding-bottom="0.083cm" fo:padding-left="0.125cm" fo:padding-right="0.125cm" fo:wrap-option="wrap" loext:decorative="false"/>
      <style:paragraph-properties style:writing-mode="lr-tb"/>
    </style:style>
    <style:style style:name="gr10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9cm" fo:padding-bottom="0.083cm" fo:padding-left="0.125cm" fo:padding-right="0.125cm" fo:wrap-option="wrap" loext:decorative="false"/>
      <style:paragraph-properties style:writing-mode="lr-tb"/>
    </style:style>
    <style:style style:name="gr10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9cm" fo:padding-bottom="0.083cm" fo:padding-left="0.125cm" fo:padding-right="0.125cm" fo:wrap-option="wrap" loext:decorative="false"/>
      <style:paragraph-properties style:writing-mode="lr-tb"/>
    </style:style>
    <style:style style:name="gr10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9cm" fo:padding-bottom="0.083cm" fo:padding-left="0.125cm" fo:padding-right="0.125cm" fo:wrap-option="wrap" loext:decorative="false"/>
      <style:paragraph-properties style:writing-mode="lr-tb"/>
    </style:style>
    <style:style style:name="gr10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9cm" fo:padding-bottom="0.083cm" fo:padding-left="0.125cm" fo:padding-right="0.125cm" fo:wrap-option="wrap" loext:decorative="false"/>
      <style:paragraph-properties style:writing-mode="lr-tb"/>
    </style:style>
    <style:style style:name="gr10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2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6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7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1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2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7" style:family="graphic" style:parent-style-name="standard">
      <style:graphic-properties draw:stroke="solid" svg:stroke-width="0.028cm" svg:stroke-color="#e8edf7" draw:stroke-linejoin="round" draw:fill="solid" draw:fill-color="#f4f6fb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28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9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0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1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2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3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4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6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7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8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9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0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1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2" style:family="graphic" style:parent-style-name="standard">
      <style:graphic-properties draw:stroke="solid" svg:stroke-width="0.035cm" svg:stroke-color="#c9973a" draw:stroke-linejoin="round" draw:fill="solid" draw:fill-color="#c9973a" draw:textarea-horizontal-align="justify" draw:textarea-vertical-align="top" draw:auto-grow-height="false" draw:fit-to-size="false" style:shrink-to-fit="false" fo:min-height="0cm" fo:min-width="0cm" fo:padding-top="0.054cm" fo:padding-bottom="0.054cm" fo:padding-left="0.25cm" fo:padding-right="0.25cm" fo:wrap-option="wrap" loext:decorative="false"/>
    </style:style>
    <style:style style:name="gr15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4" style:family="graphic" style:parent-style-name="standard">
      <style:graphic-properties draw:stroke="solid" svg:stroke-width="0.035cm" svg:stroke-color="#c9973a" draw:stroke-linejoin="round" draw:fill="solid" draw:fill-color="#c9973a" draw:textarea-horizontal-align="justify" draw:textarea-vertical-align="top" draw:auto-grow-height="false" draw:fit-to-size="false" style:shrink-to-fit="false" fo:min-height="0cm" fo:min-width="0cm" fo:padding-top="0.027cm" fo:padding-bottom="0.027cm" fo:padding-left="0.25cm" fo:padding-right="0.25cm" fo:wrap-option="wrap" loext:decorative="false"/>
    </style:style>
    <style:style style:name="gr17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1" style:family="graphic" style:parent-style-name="standard">
      <style:graphic-properties draw:stroke="solid" svg:stroke-width="0.042cm" svg:stroke-color="#c9973a" draw:stroke-linejoin="round" draw:fill="solid" draw:fill-color="#f4f6fb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9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5" style:family="graphic" style:parent-style-name="standard">
      <style:graphic-properties draw:stroke="solid" svg:stroke-width="0.035cm" svg:stroke-color="#c9973a" draw:stroke-linejoin="round" draw:fill="solid" draw:fill-color="#c9973a" draw:textarea-horizontal-align="justify" draw:textarea-vertical-align="top" draw:auto-grow-height="false" draw:fit-to-size="false" style:shrink-to-fit="false" fo:min-height="0cm" fo:min-width="0cm" fo:padding-top="0.073cm" fo:padding-bottom="0.073cm" fo:padding-left="0.25cm" fo:padding-right="0.25cm" fo:wrap-option="wrap" loext:decorative="false"/>
    </style:style>
    <style:style style:name="gr20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0" style:family="graphic" style:parent-style-name="standard">
      <style:graphic-properties draw:stroke="solid" svg:stroke-width="0.025cm" svg:stroke-color="#e8edf7" draw:stroke-linejoin="round" draw:fill="solid" draw:fill-color="#ffffff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21" style:family="graphic" style:parent-style-name="standard">
      <style:graphic-properties draw:stroke="none" svg:stroke-width="0cm" draw:fill="solid" draw:fill-color="#c0392b" draw:textarea-horizontal-align="justify" draw:textarea-vertical-align="top" draw:auto-grow-height="false" draw:fit-to-size="false" style:shrink-to-fit="false" fo:min-height="0cm" fo:min-width="0cm" fo:padding-top="0.015cm" fo:padding-bottom="0.015cm" fo:padding-left="0.25cm" fo:padding-right="0.25cm" fo:wrap-option="wrap" loext:decorative="false"/>
    </style:style>
    <style:style style:name="gr222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23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24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25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26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27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083cm" fo:padding-bottom="0.083cm" fo:padding-left="0.125cm" fo:padding-right="0.125cm" fo:wrap-option="wrap" loext:decorative="false"/>
      <style:paragraph-properties style:writing-mode="lr-tb"/>
    </style:style>
    <style:style style:name="gr22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3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5" style:family="graphic" style:parent-style-name="standard">
      <style:graphic-properties draw:stroke="solid" svg:stroke-width="0.035cm" svg:stroke-color="#2857a7" draw:stroke-linejoin="round" draw:fill="solid" draw:fill-color="#2857a7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3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Predeterminado_20_1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Predeterminado_20_1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Predeterminado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Predeterminado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Predeterminado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Predeterminado-notes">
      <style:graphic-properties draw:fill-color="#ffffff" draw:auto-grow-height="false" fo:min-height="13.365cm" loext:decorative="false"/>
      <style:paragraph-properties style:writing-mode="lr-tb"/>
    </style:style>
    <style:style style:name="pr7" style:family="presentation" style:parent-style-name="Predeterminado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Predeterminado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Predeterminado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Predeterminado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Predeterminado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Predeterminado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Predeterminado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Predeterminado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Predeterminado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Predeterminado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Predeterminado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Predeterminado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Predeterminado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Predeterminado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Predeterminado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2.794cm" style:use-optimal-column-width="false"/>
    </style:style>
    <style:style style:name="co2" style:family="table-column">
      <style:table-column-properties style:column-width="3.937cm" style:use-optimal-column-width="false"/>
    </style:style>
    <style:style style:name="co3" style:family="table-column">
      <style:table-column-properties style:column-width="2.159cm" style:use-optimal-column-width="false"/>
    </style:style>
    <style:style style:name="co4" style:family="table-column">
      <style:table-column-properties style:column-width="6.477cm" style:use-optimal-column-width="false"/>
    </style:style>
    <style:style style:name="co5" style:family="table-column">
      <style:table-column-properties style:column-width="2.921cm" style:use-optimal-column-width="false"/>
    </style:style>
    <style:style style:name="co6" style:family="table-column">
      <style:table-column-properties style:column-width="3.81cm" style:use-optimal-column-width="false"/>
    </style:style>
    <style:style style:name="co7" style:family="table-column">
      <style:table-column-properties style:column-width="6.35cm" style:use-optimal-column-width="false"/>
    </style:style>
    <style:style style:name="co8" style:family="table-column">
      <style:table-column-properties style:column-width="4.572cm" style:use-optimal-column-width="false"/>
    </style:style>
    <style:style style:name="co9" style:family="table-column">
      <style:table-column-properties style:column-width="8.636cm" style:use-optimal-column-width="false"/>
    </style:style>
    <style:style style:name="ro1" style:family="table-row">
      <style:table-row-properties style:row-height="0.771cm" style:use-optimal-row-height="false"/>
    </style:style>
    <style:style style:name="ro2" style:family="table-row">
      <style:table-row-properties style:row-height="0.76cm" style:use-optimal-row-height="false"/>
    </style:style>
    <style:style style:name="ro3" style:family="table-row">
      <style:table-row-properties style:row-height="0.759cm" style:use-optimal-row-height="false"/>
    </style:style>
    <style:style style:name="ro4" style:family="table-row">
      <style:table-row-properties style:row-height="0.762cm" style:use-optimal-row-height="false"/>
    </style:style>
    <style:style style:name="ro5" style:family="table-row">
      <style:table-row-properties style:row-height="0.734cm" style:use-optimal-row-height="false"/>
    </style:style>
    <style:style style:name="ce1" style:family="table-cell">
      <loext:graphic-properties draw:fill="solid" draw:fill-color="#1a2744" draw:textarea-vertical-align="top" fo:padding-top="0.127cm" fo:padding-bottom="0.127cm" fo:padding-left="0.254cm" fo:padding-right="0.254cm"/>
      <style:paragraph-properties fo:border="0.4pt solid #e8edf7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Calibri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" style:family="table-cell">
      <loext:graphic-properties draw:fill="solid" draw:fill-color="#1a2744" draw:textarea-vertical-align="top" fo:padding-top="0.127cm" fo:padding-bottom="0.127cm" fo:padding-left="0.254cm" fo:padding-right="0.254cm"/>
      <style:paragraph-properties fo:border="0.4pt solid #e8edf7" style:font-independent-line-spacing="true"/>
    </style:style>
    <style:style style:name="ce3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0.4pt solid #e8edf7" style:font-independent-line-spacing="true"/>
    </style:style>
    <style:style style:name="ce4" style:family="table-cell">
      <loext:graphic-properties draw:fill="solid" draw:fill-color="#1a2744" draw:textarea-vertical-align="top" fo:padding-top="0.127cm" fo:padding-bottom="0.127cm" fo:padding-left="0.254cm" fo:padding-right="0.254cm"/>
      <style:paragraph-properties fo:border="0.34pt solid #e8edf7" style:font-independent-line-spacing="true"/>
    </style:style>
    <style:style style:name="ce5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="0.34pt solid #e8edf7" style:font-independent-line-spacing="true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solid" draw:fill-color="#c9973a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 loext:tab-stop-distance="2.54cm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2.54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" style:family="paragraph">
      <loext:graphic-properties draw:fill="solid" draw:fill-color="#223366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loext:tab-stop-distance="2.54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solid" draw:fill-color="#c9973a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font-style="normal" style:text-underline-style="none" fo:font-weight="normal" fo:background-color="transparent" style:font-name-asian="DejaVu Sans" style:font-style-asian="normal" style:font-weight-asian="normal" style:font-name-complex="DejaVu Sans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loext:tab-stop-distance="2.54cm">
        <style:tab-stops/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2.54cm" style:font-independent-line-spacing="true">
        <style:tab-stops/>
      </style:paragraph-properties>
      <style:text-properties fo:font-size="18pt"/>
    </style:style>
    <style:style style:name="P12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font-style="normal" style:text-underline-style="none" fo:font-weight="normal" fo:background-color="transparent" style:font-name-asian="DejaVu Sans" style:font-style-asian="normal" style:font-weight-asian="normal" style:font-name-complex="DejaVu Sans" style:font-style-complex="normal" style:font-weight-complex="normal"/>
    </style:style>
    <style:style style:name="P13" style:family="paragraph">
      <loext:graphic-properties draw:fill="solid" draw:fill-color="#f4f6fb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font-style="normal" style:text-underline-style="none" fo:font-weight="normal" fo:background-color="transparent" style:font-name-asian="DejaVu Sans" style:font-style-asian="normal" style:font-weight-asian="normal" style:font-name-complex="DejaVu Sans" style:font-style-complex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fo:font-size="18pt"/>
    </style:style>
    <style:style style:name="P16" style:family="paragraph">
      <loext:graphic-properties draw:fill="solid" draw:fill-color="#7b8bb2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font-style="normal" style:text-underline-style="none" fo:font-weight="normal" fo:background-color="transparent" style:font-name-asian="DejaVu Sans" style:font-style-asian="normal" style:font-weight-asian="normal" style:font-name-complex="DejaVu Sans" style:font-style-complex="normal" style:font-weight-complex="normal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8" style:family="paragraph">
      <loext:graphic-properties draw:fill="solid" draw:fill-color="#1a2744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font-style="normal" style:text-underline-style="none" fo:font-weight="normal" fo:background-color="transparent" style:font-name-asian="DejaVu Sans" style:font-style-asian="normal" style:font-weight-asian="normal" style:font-name-complex="DejaVu Sans" style:font-style-complex="normal" style:font-weight-complex="normal"/>
    </style:style>
    <style:style style:name="P19" style:family="paragraph">
      <style:paragraph-properties fo:margin-left="0cm" fo:margin-right="0cm" fo:margin-top="0cm" fo:margin-bottom="0cm" fo:line-height="100%" fo:text-align="start" fo:text-indent="0cm" loext:tab-stop-distance="2.54cm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2.54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1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22" style:family="paragraph">
      <loext:graphic-properties draw:fill="solid" draw:fill-color="#1a2744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23" style:family="paragraph">
      <style:paragraph-properties fo:margin-left="0cm" fo:margin-right="0cm" fo:margin-top="0cm" fo:margin-bottom="0.141cm" fo:line-height="100%" fo:text-align="start" fo:text-indent="0cm" loext:tab-stop-distance="2.54cm">
        <style:tab-stops/>
      </style:paragraph-properties>
    </style:style>
    <style:style style:name="P24" style:family="paragraph">
      <loext:graphic-properties draw:fill="none"/>
      <style:paragraph-properties fo:margin-left="0cm" fo:margin-right="0cm" fo:margin-top="0cm" fo:margin-bottom="0.141cm" fo:line-height="100%" fo:text-align="start" fo:text-indent="0cm" loext:tab-stop-distance="2.54cm" style:font-independent-line-spacing="true">
        <style:tab-stops/>
      </style:paragraph-properties>
      <style:text-properties fo:font-size="18pt"/>
    </style:style>
    <style:style style:name="P25" style:family="paragraph">
      <loext:graphic-properties draw:fill="solid" draw:fill-color="#e8edf7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26" style:family="paragraph">
      <loext:graphic-properties draw:fill="solid" draw:fill-color="#f4f6fb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27" style:family="paragraph">
      <loext:graphic-properties draw:fill="solid" draw:fill-color="#1e8449"/>
      <style:paragraph-properties fo:margin-left="0cm" fo:margin-right="0cm" fo:margin-top="0cm" fo:margin-bottom="0cm" fo:line-height="100%" fo:text-align="center" fo:text-indent="0cm" style:font-independent-line-spacing="true"/>
      <style:text-properties fo:font-size="18pt"/>
    </style:style>
    <style:style style:name="P28" style:family="paragraph">
      <loext:graphic-properties draw:fill-color="#ffffff"/>
    </style:style>
    <style:style style:name="P29" style:family="paragraph">
      <style:paragraph-properties fo:text-align="center"/>
    </style:style>
    <style:style style:name="P30" style:family="paragraph">
      <loext:graphic-properties draw:fill="solid" draw:fill-color="#c9973a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31" style:family="paragraph">
      <loext:graphic-properties draw:fill="solid" draw:fill-color="#065a82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32" style:family="paragraph">
      <loext:graphic-properties draw:fill="solid" draw:fill-color="#1a4d2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33" style:family="paragraph">
      <loext:graphic-properties draw:fill="solid" draw:fill-color="#f4f6fb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34" style:family="paragraph">
      <loext:graphic-properties draw:fill="solid" draw:fill-color="#1a2744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P36" style:family="paragraph">
      <style:paragraph-properties fo:margin-left="0cm" fo:margin-right="0cm" fo:margin-top="0cm" fo:margin-bottom="0.176cm" fo:line-height="100%" fo:text-align="start" fo:text-indent="0cm" loext:tab-stop-distance="2.54cm">
        <style:tab-stops/>
      </style:paragraph-properties>
    </style:style>
    <style:style style:name="P37" style:family="paragraph">
      <loext:graphic-properties draw:fill="none"/>
      <style:paragraph-properties fo:margin-left="0cm" fo:margin-right="0cm" fo:margin-top="0cm" fo:margin-bottom="0.176cm" fo:line-height="100%" fo:text-align="start" fo:text-indent="0cm" loext:tab-stop-distance="2.54cm" style:font-independent-line-spacing="true">
        <style:tab-stops/>
      </style:paragraph-properties>
      <style:text-properties fo:font-size="18pt"/>
    </style:style>
    <style:style style:name="P38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39" style:family="paragraph">
      <loext:graphic-properties draw:fill="solid" draw:fill-color="#c0392b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40" style:family="paragraph">
      <loext:graphic-properties draw:fill="solid" draw:fill-color="#2857a7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52pt" fo:letter-spacing="normal" fo:language="en" fo:country="US" fo:font-style="normal" style:text-underline-style="none" fo:font-weight="bold" fo:background-color="transparent" style:font-name-asian="Calibri" style:font-size-asian="52pt" style:font-style-asian="normal" style:font-weight-asian="bold" style:font-name-complex="DejaVu Sans" style:font-size-complex="52pt" style:font-style-complex="normal" style:font-weight-complex="bold"/>
    </style:style>
    <style:style style:name="T3" style:family="text">
      <style:text-properties fo:font-variant="normal" fo:text-transform="none" fo:color="#c9973a" loext:opacity="100%" style:text-outline="false" style:text-line-through-style="none" style:text-line-through-type="none" style:text-position="0% 100%" style:font-name="Calibri" fo:font-size="22pt" fo:letter-spacing="normal" fo:language="en" fo:country="US" fo:font-style="italic" style:text-underline-style="none" fo:font-weight="normal" fo:background-color="transparent" style:font-name-asian="Calibri" style:font-size-asian="22pt" style:font-style-asian="italic" style:font-weight-asian="normal" style:font-name-complex="DejaVu Sans" style:font-size-complex="22pt" style:font-style-complex="italic" style:font-weight-complex="normal"/>
    </style:style>
    <style:style style:name="T4" style:family="text">
      <style:text-properties fo:font-variant="normal" fo:text-transform="none" fo:color="#c9973a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5" style:family="text">
      <style:text-properties fo:font-variant="normal" fo:text-transform="none" fo:color="#7b9bcc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normal" fo:background-color="transparent" style:font-name-asian="Calibri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letter-spacing="normal" fo:font-style="normal" style:text-underline-style="none" fo:font-weight="normal" fo:background-color="transparent" style:font-name-asian="DejaVu Sans" style:font-style-asian="normal" style:font-weight-asian="normal" style:font-name-complex="DejaVu Sans" style:font-style-complex="normal" style:font-weight-complex="normal"/>
    </style:style>
    <style:style style:name="T8" style:family="text">
      <style:text-properties fo:font-variant="normal" fo:text-transform="none" fo:color="#1a2744" loext:opacity="100%" style:text-outline="false" style:text-line-through-style="none" style:text-line-through-type="none" style:text-position="0% 100%" style:font-name="Calibri" fo:font-size="26pt" fo:letter-spacing="normal" fo:language="es" fo:country="ES" fo:font-style="normal" style:text-underline-style="none" fo:font-weight="bold" fo:background-color="transparent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9" style:family="text">
      <style:text-properties fo:font-variant="normal" fo:text-transform="none" fo:color="#c9973a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0" style:family="text">
      <style:text-properties fo:font-variant="normal" fo:text-transform="none" fo:color="#1a2744" loext:opacity="100%" style:text-outline="false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1" style:family="text">
      <style:text-properties fo:font-variant="normal" fo:text-transform="none" fo:color="#aabbdd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12" style:family="text">
      <style:text-properties fo:font-variant="normal" fo:text-transform="none" fo:color="#1a2744" loext:opacity="100%" style:text-outline="false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bold" fo:background-color="transparent" style:font-name-asian="Calibri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13" style:family="text">
      <style:text-properties fo:font-variant="normal" fo:text-transform="none" fo:color="#aabbdd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name-asian="Calibri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14" style:family="text">
      <style:text-properties fo:font-variant="normal" fo:text-transform="none" fo:color="#1a2744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name-asian="Calibri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5" style:family="text">
      <style:text-properties fo:font-variant="normal" fo:text-transform="none" fo:color="#1a2744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name-asian="Calibri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7" style:family="text">
      <style:text-properties fo:font-variant="normal" fo:text-transform="none" fo:color="#1a2744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name-asian="Calibri" style:font-size-asian="13pt" style:font-style-asian="normal" style:font-weight-asian="bold" style:font-name-complex="DejaVu Sans" style:font-size-complex="13pt" style:font-style-complex="normal" style:font-weight-complex="bold"/>
    </style:style>
    <style:style style:name="T18" style:family="text">
      <style:text-properties fo:font-variant="normal" fo:text-transform="none" fo:color="#7b8bb2" loext:opacity="100%" style:text-outline="false" style:text-line-through-style="none" style:text-line-through-type="none" style:text-position="0% 100%" style:font-name="Calibri" fo:font-size="11.5pt" fo:letter-spacing="normal" fo:language="en" fo:country="US" fo:font-style="normal" style:text-underline-style="none" fo:font-weight="normal" fo:background-color="transparent" style:font-name-asian="Calibri" style:font-size-asian="11.5pt" style:font-style-asian="normal" style:font-weight-asian="normal" style:font-name-complex="DejaVu Sans" style:font-size-complex="11.5pt" style:font-style-complex="normal" style:font-weight-complex="normal"/>
    </style:style>
    <style:style style:name="T19" style:family="text">
      <style:text-properties fo:font-variant="normal" fo:text-transform="none" fo:color="#1a2744" loext:opacity="100%" style:text-outline="false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bold" fo:background-color="transparent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20" style:family="text">
      <style:text-properties fo:font-variant="normal" fo:text-transform="none" fo:color="#7b8bb2" loext:opacity="10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fo:background-color="transparent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9pt" fo:letter-spacing="normal" fo:language="es" fo:country="ES" fo:font-style="normal" style:text-underline-style="none" fo:font-weight="bold" fo:background-color="transparent" style:font-name-asian="DejaVu Sans" style:font-size-asian="9pt" style:font-style-asian="normal" style:font-weight-asian="bold" style:font-name-complex="DejaVu Sans" style:font-size-complex="9pt" style:font-style-complex="normal" style:font-weight-complex="bold"/>
    </style:style>
    <style:style style:name="T22" style:family="text">
      <style:text-properties fo:font-variant="normal" fo:text-transform="none" fo:color="#1a2744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name-asian="Calibri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name-asian="Calibri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4pt" fo:letter-spacing="normal" fo:language="es" fo:country="ES" fo:font-style="normal" style:text-underline-style="none" fo:font-weight="bold" fo:background-color="transparent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26" style:family="text">
      <style:text-properties fo:font-variant="normal" fo:text-transform="none" fo:color="#2857a7" loext:opacity="100%" style:text-outline="false" style:text-line-through-style="none" style:text-line-through-type="none" style:text-position="0% 100%" style:font-name="Calibri" fo:font-size="9.80000019073486pt" fo:letter-spacing="normal" fo:language="es" fo:country="ES" fo:font-style="normal" style:text-underline-style="none" fo:font-weight="normal" fo:background-color="transparent" style:font-name-asian="DejaVu Sans" style:font-size-asian="9.80000019073486pt" style:font-style-asian="normal" style:font-weight-asian="normal" style:font-name-complex="DejaVu Sans" style:font-size-complex="9.80000019073486pt" style:font-style-complex="normal" style:font-weight-complex="normal"/>
    </style:style>
    <style:style style:name="T27" style:family="text">
      <style:text-properties fo:font-variant="normal" fo:text-transform="none" fo:color="#7b8bb2" loext:opacity="100%" style:text-outline="false" style:text-line-through-style="none" style:text-line-through-type="none" style:text-position="0% 100%" style:font-name="Calibri" fo:font-size="9.80000019073486pt" fo:letter-spacing="normal" fo:language="es" fo:country="ES" fo:font-style="normal" style:text-underline-style="none" fo:font-weight="normal" fo:background-color="transparent" style:font-name-asian="DejaVu Sans" style:font-size-asian="9.80000019073486pt" style:font-style-asian="normal" style:font-weight-asian="normal" style:font-name-complex="DejaVu Sans" style:font-size-complex="9.80000019073486pt" style:font-style-complex="normal" style:font-weight-complex="normal"/>
    </style:style>
    <style:style style:name="T28" style:family="text">
      <style:text-properties fo:font-variant="normal" fo:text-transform="none" fo:color="#7b8bb2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name-asian="Calibri" style:font-size-asian="13pt" style:font-style-asian="normal" style:font-weight-asian="bold" style:font-name-complex="DejaVu Sans" style:font-size-complex="13pt" style:font-style-complex="normal" style:font-weight-complex="bold"/>
    </style:style>
    <style:style style:name="T29" style:family="text">
      <style:text-properties fo:font-variant="normal" fo:text-transform="none" fo:color="#2857a7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name-asian="Calibri" style:font-size-asian="13pt" style:font-style-asian="normal" style:font-weight-asian="bold" style:font-name-complex="DejaVu Sans" style:font-size-complex="13pt" style:font-style-complex="normal" style:font-weight-complex="bold"/>
    </style:style>
    <style:style style:name="T30" style:family="text">
      <style:text-properties fo:font-variant="normal" fo:text-transform="none" fo:color="#1a2744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name-asian="Calibri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31" style:family="text">
      <style:text-properties fo:font-variant="normal" fo:text-transform="none" fo:color="#2857a7" loext:opacity="100%" style:text-outline="false" style:text-line-through-style="none" style:text-line-through-type="none" style:text-position="0% 100%" style:font-name="Calibri" fo:font-size="11.5pt" fo:letter-spacing="normal" fo:language="en" fo:country="US" fo:font-style="normal" style:text-underline-style="none" fo:font-weight="bold" fo:background-color="transparent" style:font-name-asian="Calibri" style:font-size-asian="11.5pt" style:font-style-asian="normal" style:font-weight-asian="bold" style:font-name-complex="DejaVu Sans" style:font-size-complex="11.5pt" style:font-style-complex="normal" style:font-weight-complex="bold"/>
    </style:style>
    <style:style style:name="T32" style:family="text">
      <style:text-properties fo:font-variant="normal" fo:text-transform="none" fo:color="#7b8bb2" loext:opacity="100%" style:text-outline="false" style:text-line-through-style="none" style:text-line-through-type="none" style:text-position="0% 100%" style:font-name="Calibri" fo:font-size="9.5pt" fo:letter-spacing="normal" fo:language="en" fo:country="US" fo:font-style="normal" style:text-underline-style="none" fo:font-weight="normal" fo:background-color="transparent" style:font-name-asian="Calibri" style:font-size-asian="9.5pt" style:font-style-asian="normal" style:font-weight-asian="normal" style:font-name-complex="DejaVu Sans" style:font-size-complex="9.5pt" style:font-style-complex="normal" style:font-weight-complex="normal"/>
    </style:style>
    <style:style style:name="T3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bold" fo:background-color="transparent" style:font-name-asian="Calibri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name-asian="Calibri" style:font-size-asian="10.5pt" style:font-style-asian="normal" style:font-weight-asian="normal" style:font-size-complex="10.5pt" style:font-style-complex="normal" style:font-weight-complex="normal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2.5pt" fo:letter-spacing="normal" fo:language="en" fo:country="US" fo:font-style="normal" style:text-underline-style="none" fo:font-weight="bold" fo:background-color="transparent" style:font-name-asian="Calibri" style:font-size-asian="12.5pt" style:font-style-asian="normal" style:font-weight-asian="bold" style:font-name-complex="DejaVu Sans" style:font-size-complex="12.5pt" style:font-style-complex="normal" style:font-weight-complex="bold"/>
    </style:style>
    <style:style style:name="T36" style:family="text">
      <style:text-properties fo:font-variant="normal" fo:text-transform="none" fo:color="#1a2744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Calibri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37" style:family="text">
      <style:text-properties fo:font-variant="normal" fo:text-transform="none" fo:color="#1a2744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bold" fo:background-color="transparent" style:font-name-asian="Calibri" style:font-size-asian="13.5pt" style:font-style-asian="normal" style:font-weight-asian="bold" style:font-name-complex="DejaVu Sans" style:font-size-complex="13.5pt" style:font-style-complex="normal" style:font-weight-complex="bold"/>
    </style:style>
    <style:style style:name="T38" style:family="text">
      <style:text-properties fo:font-variant="normal" fo:text-transform="none" fo:color="#1a2744" loext:opacity="100%" style:text-outline="false" style:text-line-through-style="none" style:text-line-through-type="none" style:text-position="0% 100%" style:font-name="Calibri" fo:font-size="11.5pt" fo:letter-spacing="normal" fo:language="en" fo:country="US" fo:font-style="normal" style:text-underline-style="none" fo:font-weight="normal" fo:background-color="transparent" style:font-name-asian="Calibri" style:font-size-asian="11.5pt" style:font-style-asian="normal" style:font-weight-asian="normal" style:font-name-complex="DejaVu Sans" style:font-size-complex="11.5pt" style:font-style-complex="normal" style:font-weight-complex="normal"/>
    </style:style>
    <style:style style:name="T39" style:family="text">
      <style:text-properties fo:font-variant="normal" fo:text-transform="none" fo:color="#1a2744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4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4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name-asian="Calibri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fo:font-variant="normal" fo:text-transform="none" fo:color="#c9973a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name-asian="Calibri" style:font-size-asian="13pt" style:font-style-asian="normal" style:font-weight-asian="bold" style:font-name-complex="DejaVu Sans" style:font-size-complex="13pt" style:font-style-complex="normal" style:font-weight-complex="bold"/>
    </style:style>
    <style:style style:name="T43" style:family="text">
      <style:text-properties fo:font-variant="normal" fo:text-transform="none" fo:color="#aabbdd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44" style:family="text">
      <style:text-properties fo:font-variant="normal" fo:text-transform="none" fo:color="#c0392b" loext:opacity="100%" style:text-outline="false" style:text-line-through-style="none" style:text-line-through-type="none" style:text-position="0% 100%" style:font-name="Calibri" fo:font-size="9pt" fo:letter-spacing="normal" fo:language="es" fo:country="ES" fo:font-style="normal" style:text-underline-style="none" fo:font-weight="normal" fo:background-color="transparent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es" fo:country="ES" fo:font-style="normal" style:text-underline-style="none" fo:font-weight="normal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46" style:family="text">
      <style:text-properties fo:font-variant="normal" fo:text-transform="none" fo:color="#1e8449" loext:opacity="100%" style:text-outline="false" style:text-line-through-style="none" style:text-line-through-type="none" style:text-position="0% 100%" style:font-name="Calibri" fo:font-size="9pt" fo:letter-spacing="normal" fo:language="es" fo:country="ES" fo:font-style="normal" style:text-underline-style="none" fo:font-weight="normal" fo:background-color="transparent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47" style:family="text">
      <style:text-properties fo:font-variant="normal" fo:text-transform="none" fo:color="#1a2744" loext:opacity="10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fo:background-color="transparent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48" style:family="text">
      <style:text-properties fo:font-variant="normal" fo:text-transform="none" fo:color="#c9973a" loext:opacity="100%" style:text-outline="false" style:text-line-through-style="none" style:text-line-through-type="none" style:text-position="0% 100%" style:font-name="Calibri" fo:font-size="13pt" fo:letter-spacing="normal" fo:language="en" fo:country="US" fo:font-style="italic" style:text-underline-style="none" fo:font-weight="normal" fo:background-color="transparent" style:font-name-asian="Calibri" style:font-size-asian="13pt" style:font-style-asian="italic" style:font-weight-asian="normal" style:font-name-complex="DejaVu Sans" style:font-size-complex="13pt" style:font-style-complex="italic" style:font-weight-complex="normal"/>
    </style:style>
    <style:style style:name="T4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58pt" fo:letter-spacing="normal" fo:language="en" fo:country="US" fo:font-style="normal" style:text-underline-style="none" fo:font-weight="bold" fo:background-color="transparent" style:font-name-asian="Calibri" style:font-size-asian="58pt" style:font-style-asian="normal" style:font-weight-asian="bold" style:font-name-complex="DejaVu Sans" style:font-size-complex="58pt" style:font-style-complex="normal" style:font-weight-complex="bold"/>
    </style:style>
    <style:style style:name="T50" style:family="text">
      <style:text-properties fo:font-variant="normal" fo:text-transform="none" fo:color="#c9973a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normal" fo:background-color="transparent" style:font-name-asian="Calibri" style:font-size-asian="22pt" style:font-style-asian="normal" style:font-weight-asian="normal" style:font-name-complex="DejaVu Sans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c9973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7b9b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1a2744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aabbdd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">
        <style:list-level-properties text:min-label-width="0.953cm"/>
        <style:text-properties fo:font-family="Symbol" style:font-charset="x-symbol" fo:color="#1a2744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OpenSymbol" fo:color="#7b8bb2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OpenSymbol" fo:color="#2857a7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fo:color="#c0392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OpenSymbol" fo:color="#1e844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_20_1" presentation:presentation-page-layout-name="AL1T0">
        <office:forms form:automatic-focus="false" form:apply-design-mode="false"/>
        <draw:custom-shape draw:name="Shape 0" draw:style-name="gr1" draw:text-style-name="P2" draw:layer="layout" svg:width="25.397cm" svg:height="0.302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2" draw:layer="layout" svg:width="25.397cm" svg:height="0.315cm" svg:x="0cm" svg:y="13.9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" draw:text-style-name="P4" draw:layer="layout" svg:width="22.349cm" svg:height="3.553cm" svg:x="1.524cm" svg:y="3.048cm">
          <text:p text:style-name="P3"><text:span text:style-name="T2">Clon de Agape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" draw:text-style-name="P4" draw:layer="layout" svg:width="22.349cm" svg:height="1.775cm" svg:x="1.524cm" svg:y="6.731cm">
          <text:p text:style-name="P3"><text:span text:style-name="T3">Plataforma de Venta de Libros Onlin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4" draw:text-style-name="P5" draw:layer="layout" svg:width="5.331cm" svg:height="1.14cm" svg:x="1.397cm" svg:y="9.017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1333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5" draw:style-name="gr5" draw:text-style-name="P4" draw:layer="layout" svg:width="5.331cm" svg:height="1.14cm" svg:x="1.397cm" svg:y="9.017cm">
          <text:p text:style-name="P3"><text:span text:style-name="T4">PHP 8 · Larave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4" draw:text-style-name="P5" draw:layer="layout" svg:width="5.331cm" svg:height="1.14cm" svg:x="7.112cm" svg:y="9.017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1333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7" draw:style-name="gr6" draw:text-style-name="P4" draw:layer="layout" svg:width="5.331cm" svg:height="1.14cm" svg:x="7.112cm" svg:y="9.017cm">
          <text:p text:style-name="P3"><text:span text:style-name="T4">Vanilla JS ES6+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" draw:text-style-name="P5" draw:layer="layout" svg:width="5.331cm" svg:height="1.14cm" svg:x="12.827cm" svg:y="9.017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1333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9" draw:style-name="gr7" draw:text-style-name="P4" draw:layer="layout" svg:width="5.331cm" svg:height="1.14cm" svg:x="12.827cm" svg:y="9.017cm">
          <text:p text:style-name="P3"><text:span text:style-name="T4">MySQL / MariaDB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" draw:text-style-name="P5" draw:layer="layout" svg:width="5.331cm" svg:height="1.14cm" svg:x="18.542cm" svg:y="9.017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1333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11" draw:style-name="gr8" draw:text-style-name="P4" draw:layer="layout" svg:width="5.331cm" svg:height="1.14cm" svg:x="18.542cm" svg:y="9.017cm">
          <text:p text:style-name="P3"><text:span text:style-name="T4">API REST · Headles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9" draw:text-style-name="P4" draw:layer="layout" svg:width="22.349cm" svg:height="1.14cm" svg:x="1.524cm" svg:y="10.922cm">
          <text:p text:style-name="P3"><text:span text:style-name="T5">Richard Clive Elespuru Rojas · Tomás Pitaluga Díaz <text:s/>| <text:s/>ASIR -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0" draw:layer="layout" svg:width="15.237cm" svg:height="8.57cm" svg:x="1.905cm" svg:y="3.175cm" draw:page-number="1" presentation:class="page"/>
          <draw:frame draw:name="PlaceHolder 2" presentation:style-name="pr1" draw:text-style-name="P6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2" draw:text-style-name="P8" draw:layer="layout" svg:width="8.252cm" svg:height="1.271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2" draw:style-name="dp3" draw:master-page-name="Predeterminado">
        <draw:custom-shape draw:name="GoldBar" draw:style-name="gr1" draw:text-style-name="P9" draw:layer="layout" svg:width="0.15cm" svg:height="1.395cm" svg:x="1.016cm" svg:y="0.559cm">
          <text:p text:style-name="P1"><text:span text:style-name="T7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" draw:style-name="gr11" draw:text-style-name="P11" draw:layer="layout" svg:width="23.112cm" svg:height="1.649cm" svg:x="1.397cm" svg:y="0.457cm">
          <text:p text:style-name="P10"><text:span text:style-name="T8">Índic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Divider" draw:style-name="gr12" draw:text-style-name="P12" draw:layer="layout" svg:x1="1.016cm" svg:y1="2.159cm" svg:x2="24.384cm" svg:y2="2.16cm">
          <text:p/>
        </draw:line>
        <draw:custom-shape draw:name="CardBG_01" draw:style-name="gr13" draw:text-style-name="P13" draw:layer="layout" svg:width="11.175cm" svg:height="0.937cm" svg:x="1.016cm" svg:y="2.432cm">
          <text:p text:style-name="P1"><text:span text:style-name="T7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um_01" draw:style-name="gr14" draw:text-style-name="P15" draw:layer="layout" svg:width="0.999cm" svg:height="0.937cm" svg:x="1.27cm" svg:y="2.432cm">
          <text:p text:style-name="P14"><text:span text:style-name="T9">0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p_01" draw:style-name="gr15" draw:text-style-name="P16" draw:layer="layout" svg:width="0.074cm" svg:height="0.899cm" svg:x="2.422cm" svg:y="2.451cm">
          <text:p text:style-name="P1"><text:span text:style-name="T7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bel_01" draw:style-name="gr16" draw:text-style-name="P17" draw:layer="layout" svg:width="9.438cm" svg:height="0.937cm" svg:x="2.627cm" svg:y="2.432cm">
          <text:p text:style-name="P1"><text:span text:style-name="T10">Descripción del Proyect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BG_02" draw:style-name="gr13" draw:text-style-name="P13" draw:layer="layout" svg:width="11.175cm" svg:height="0.937cm" svg:x="1.016cm" svg:y="3.43cm">
          <text:p text:style-name="P1"><text:span text:style-name="T7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um_02" draw:style-name="gr17" draw:text-style-name="P15" draw:layer="layout" svg:width="0.999cm" svg:height="0.937cm" svg:x="1.27cm" svg:y="3.43cm">
          <text:p text:style-name="P14"><text:span text:style-name="T9">0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p_02" draw:style-name="gr15" draw:text-style-name="P16" draw:layer="layout" svg:width="0.074cm" svg:height="0.899cm" svg:x="2.422cm" svg:y="3.449cm">
          <text:p text:style-name="P1"><text:span text:style-name="T7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bel_02" draw:style-name="gr18" draw:text-style-name="P17" draw:layer="layout" svg:width="9.438cm" svg:height="0.937cm" svg:x="2.627cm" svg:y="3.43cm">
          <text:p text:style-name="P1"><text:span text:style-name="T10">Requisitos Funcional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BG_03" draw:style-name="gr13" draw:text-style-name="P13" draw:layer="layout" svg:width="11.175cm" svg:height="0.937cm" svg:x="1.016cm" svg:y="4.428cm">
          <text:p text:style-name="P1"><text:span text:style-name="T7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um_03" draw:style-name="gr19" draw:text-style-name="P15" draw:layer="layout" svg:width="0.999cm" svg:height="0.937cm" svg:x="1.27cm" svg:y="4.428cm">
          <text:p text:style-name="P14"><text:span text:style-name="T9">0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p_03" draw:style-name="gr15" draw:text-style-name="P16" draw:layer="layout" svg:width="0.074cm" svg:height="0.899cm" svg:x="2.422cm" svg:y="4.447cm">
          <text:p text:style-name="P1"><text:span text:style-name="T7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bel_03" draw:style-name="gr20" draw:text-style-name="P17" draw:layer="layout" svg:width="9.438cm" svg:height="0.937cm" svg:x="2.627cm" svg:y="4.428cm">
          <text:p text:style-name="P1"><text:span text:style-name="T10">Arquitectura del Sistem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BG_04" draw:style-name="gr13" draw:text-style-name="P13" draw:layer="layout" svg:width="11.175cm" svg:height="0.937cm" svg:x="1.016cm" svg:y="5.426cm">
          <text:p text:style-name="P1"><text:span text:style-name="T7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um_04" draw:style-name="gr21" draw:text-style-name="P15" draw:layer="layout" svg:width="0.999cm" svg:height="0.937cm" svg:x="1.27cm" svg:y="5.426cm">
          <text:p text:style-name="P14"><text:span text:style-name="T9">0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p_04" draw:style-name="gr15" draw:text-style-name="P16" draw:layer="layout" svg:width="0.074cm" svg:height="0.899cm" svg:x="2.422cm" svg:y="5.445cm">
          <text:p text:style-name="P1"><text:span text:style-name="T7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bel_04" draw:style-name="gr22" draw:text-style-name="P17" draw:layer="layout" svg:width="9.438cm" svg:height="0.937cm" svg:x="2.627cm" svg:y="5.426cm">
          <text:p text:style-name="P1"><text:span text:style-name="T10">Stack Tecnológic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BG_05" draw:style-name="gr13" draw:text-style-name="P13" draw:layer="layout" svg:width="11.175cm" svg:height="0.937cm" svg:x="1.016cm" svg:y="6.424cm">
          <text:p text:style-name="P1"><text:span text:style-name="T7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um_05" draw:style-name="gr23" draw:text-style-name="P15" draw:layer="layout" svg:width="0.999cm" svg:height="0.937cm" svg:x="1.27cm" svg:y="6.424cm">
          <text:p text:style-name="P14"><text:span text:style-name="T9">0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p_05" draw:style-name="gr15" draw:text-style-name="P16" draw:layer="layout" svg:width="0.074cm" svg:height="0.899cm" svg:x="2.422cm" svg:y="6.443cm">
          <text:p text:style-name="P1"><text:span text:style-name="T7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bel_05" draw:style-name="gr24" draw:text-style-name="P17" draw:layer="layout" svg:width="9.438cm" svg:height="0.937cm" svg:x="2.627cm" svg:y="6.424cm">
          <text:p text:style-name="P1"><text:span text:style-name="T10">Diseño de Interfac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BG_06" draw:style-name="gr13" draw:text-style-name="P13" draw:layer="layout" svg:width="11.175cm" svg:height="0.937cm" svg:x="1.016cm" svg:y="7.422cm">
          <text:p text:style-name="P1"><text:span text:style-name="T7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um_06" draw:style-name="gr25" draw:text-style-name="P15" draw:layer="layout" svg:width="0.999cm" svg:height="0.937cm" svg:x="1.27cm" svg:y="7.422cm">
          <text:p text:style-name="P14"><text:span text:style-name="T9">0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p_06" draw:style-name="gr15" draw:text-style-name="P16" draw:layer="layout" svg:width="0.074cm" svg:height="0.899cm" svg:x="2.422cm" svg:y="7.441cm">
          <text:p text:style-name="P1"><text:span text:style-name="T7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bel_06" draw:style-name="gr26" draw:text-style-name="P17" draw:layer="layout" svg:width="9.438cm" svg:height="0.937cm" svg:x="2.627cm" svg:y="7.422cm">
          <text:p text:style-name="P1"><text:span text:style-name="T10">Base de Da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BG_07" draw:style-name="gr13" draw:text-style-name="P13" draw:layer="layout" svg:width="11.175cm" svg:height="0.937cm" svg:x="13.208cm" svg:y="2.432cm">
          <text:p text:style-name="P1"><text:span text:style-name="T7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um_07" draw:style-name="gr27" draw:text-style-name="P15" draw:layer="layout" svg:width="0.999cm" svg:height="0.937cm" svg:x="13.462cm" svg:y="2.432cm">
          <text:p text:style-name="P14"><text:span text:style-name="T9">0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p_07" draw:style-name="gr15" draw:text-style-name="P16" draw:layer="layout" svg:width="0.074cm" svg:height="0.899cm" svg:x="14.614cm" svg:y="2.451cm">
          <text:p text:style-name="P1"><text:span text:style-name="T7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bel_07" draw:style-name="gr28" draw:text-style-name="P17" draw:layer="layout" svg:width="9.438cm" svg:height="0.937cm" svg:x="14.819cm" svg:y="2.432cm">
          <text:p text:style-name="P1"><text:span text:style-name="T10">API RES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BG_08" draw:style-name="gr13" draw:text-style-name="P13" draw:layer="layout" svg:width="11.175cm" svg:height="0.937cm" svg:x="13.208cm" svg:y="3.43cm">
          <text:p text:style-name="P1"><text:span text:style-name="T7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um_08" draw:style-name="gr29" draw:text-style-name="P15" draw:layer="layout" svg:width="0.999cm" svg:height="0.937cm" svg:x="13.462cm" svg:y="3.43cm">
          <text:p text:style-name="P14"><text:span text:style-name="T9">08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p_08" draw:style-name="gr15" draw:text-style-name="P16" draw:layer="layout" svg:width="0.074cm" svg:height="0.899cm" svg:x="14.614cm" svg:y="3.449cm">
          <text:p text:style-name="P1"><text:span text:style-name="T7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bel_08" draw:style-name="gr30" draw:text-style-name="P17" draw:layer="layout" svg:width="9.438cm" svg:height="0.937cm" svg:x="14.819cm" svg:y="3.43cm">
          <text:p text:style-name="P1"><text:span text:style-name="T10">Funcionalidades Clav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BG_09" draw:style-name="gr13" draw:text-style-name="P13" draw:layer="layout" svg:width="11.175cm" svg:height="0.937cm" svg:x="13.208cm" svg:y="4.428cm">
          <text:p text:style-name="P1"><text:span text:style-name="T7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um_09" draw:style-name="gr31" draw:text-style-name="P15" draw:layer="layout" svg:width="0.999cm" svg:height="0.937cm" svg:x="13.462cm" svg:y="4.428cm">
          <text:p text:style-name="P14"><text:span text:style-name="T9">09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p_09" draw:style-name="gr15" draw:text-style-name="P16" draw:layer="layout" svg:width="0.074cm" svg:height="0.899cm" svg:x="14.614cm" svg:y="4.447cm">
          <text:p text:style-name="P1"><text:span text:style-name="T7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bel_09" draw:style-name="gr32" draw:text-style-name="P17" draw:layer="layout" svg:width="9.438cm" svg:height="0.937cm" svg:x="14.819cm" svg:y="4.428cm">
          <text:p text:style-name="P1"><text:span text:style-name="T10">Seguridad y Autenticació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BG_10" draw:style-name="gr13" draw:text-style-name="P13" draw:layer="layout" svg:width="11.175cm" svg:height="0.937cm" svg:x="13.208cm" svg:y="5.426cm">
          <text:p text:style-name="P1"><text:span text:style-name="T7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um_10" draw:style-name="gr33" draw:text-style-name="P15" draw:layer="layout" svg:width="0.999cm" svg:height="0.937cm" svg:x="13.462cm" svg:y="5.426cm">
          <text:p text:style-name="P14"><text:span text:style-name="T9">1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p_10" draw:style-name="gr15" draw:text-style-name="P16" draw:layer="layout" svg:width="0.074cm" svg:height="0.899cm" svg:x="14.614cm" svg:y="5.445cm">
          <text:p text:style-name="P1"><text:span text:style-name="T7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bel_10" draw:style-name="gr34" draw:text-style-name="P17" draw:layer="layout" svg:width="9.438cm" svg:height="0.937cm" svg:x="14.819cm" svg:y="5.426cm">
          <text:p text:style-name="P1"><text:span text:style-name="T10">Uso de Inteligencia Artificia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BG_11" draw:style-name="gr13" draw:text-style-name="P13" draw:layer="layout" svg:width="11.175cm" svg:height="0.937cm" svg:x="13.208cm" svg:y="6.424cm">
          <text:p text:style-name="P1"><text:span text:style-name="T7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um_11" draw:style-name="gr35" draw:text-style-name="P15" draw:layer="layout" svg:width="0.999cm" svg:height="0.937cm" svg:x="13.462cm" svg:y="6.424cm">
          <text:p text:style-name="P14"><text:span text:style-name="T9">1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p_11" draw:style-name="gr15" draw:text-style-name="P16" draw:layer="layout" svg:width="0.074cm" svg:height="0.899cm" svg:x="14.614cm" svg:y="6.443cm">
          <text:p text:style-name="P1"><text:span text:style-name="T7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bel_11" draw:style-name="gr36" draw:text-style-name="P17" draw:layer="layout" svg:width="9.438cm" svg:height="0.937cm" svg:x="14.819cm" svg:y="6.424cm">
          <text:p text:style-name="P1"><text:span text:style-name="T10">Problemas y Solucion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BG_12" draw:style-name="gr13" draw:text-style-name="P13" draw:layer="layout" svg:width="11.175cm" svg:height="0.937cm" svg:x="13.208cm" svg:y="7.422cm">
          <text:p text:style-name="P1"><text:span text:style-name="T7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um_12" draw:style-name="gr37" draw:text-style-name="P15" draw:layer="layout" svg:width="0.999cm" svg:height="0.937cm" svg:x="13.462cm" svg:y="7.422cm">
          <text:p text:style-name="P14"><text:span text:style-name="T9">1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p_12" draw:style-name="gr15" draw:text-style-name="P16" draw:layer="layout" svg:width="0.074cm" svg:height="0.899cm" svg:x="14.614cm" svg:y="7.441cm">
          <text:p text:style-name="P1"><text:span text:style-name="T7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bel_12" draw:style-name="gr38" draw:text-style-name="P17" draw:layer="layout" svg:width="9.438cm" svg:height="0.937cm" svg:x="14.819cm" svg:y="7.422cm">
          <text:p text:style-name="P1"><text:span text:style-name="T10">Conclusión y Mejoras Futura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Bar" draw:style-name="gr39" draw:text-style-name="P18" draw:layer="layout" svg:width="25.398cm" svg:height="0.697cm" svg:x="0cm" svg:y="13.589cm">
          <text:p text:style-name="P1"><text:span text:style-name="T7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Text" draw:style-name="gr40" draw:text-style-name="P17" draw:layer="layout" svg:width="17.778cm" svg:height="0.697cm" svg:x="0.762cm" svg:y="13.589cm">
          <text:p text:style-name="P1"><text:span text:style-name="T11">Clon de Agapea · Richard &amp; Tomás ·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geNum" draw:style-name="gr41" draw:text-style-name="P15" draw:layer="layout" svg:width="1.268cm" svg:height="0.697cm" svg:x="23.876cm" svg:y="13.589cm">
          <text:p text:style-name="P14"><text:span text:style-name="T11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0" draw:layer="layout" svg:width="15.237cm" svg:height="8.57cm" svg:x="1.905cm" svg:y="3.175cm" draw:page-number="2" presentation:class="page"/>
          <draw:frame draw:name="PlaceHolder 2" presentation:style-name="pr3" draw:text-style-name="P6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4" draw:text-style-name="P8" draw:layer="layout" svg:width="8.252cm" svg:height="1.271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3" draw:style-name="dp3" draw:master-page-name="Predeterminado">
        <draw:custom-shape draw:name="Shape 0" draw:style-name="gr1" draw:text-style-name="P2" draw:layer="layout" svg:width="0.149cm" svg:height="1.394cm" svg:x="1.016cm" svg:y="0.55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2" draw:text-style-name="P20" draw:layer="layout" svg:width="23.111cm" svg:height="1.648cm" svg:x="1.397cm" svg:y="0.457cm">
          <text:p text:style-name="P19"><text:span text:style-name="T12">Descripción del Proyect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" draw:style-name="gr12" draw:text-style-name="P21" draw:layer="layout" svg:x1="1.016cm" svg:y1="2.159cm" svg:x2="24.384cm" svg:y2="2.16cm">
          <text:p/>
        </draw:line>
        <draw:custom-shape draw:name="Shape 3" draw:style-name="gr39" draw:text-style-name="P22" draw:layer="layout" svg:width="25.397cm" svg:height="0.696cm" svg:x="0cm" svg:y="13.58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3" draw:text-style-name="P20" draw:layer="layout" svg:width="17.777cm" svg:height="0.696cm" svg:x="0.762cm" svg:y="13.589cm">
          <text:p text:style-name="P19"><text:span text:style-name="T13">Clon de Agapea · Richard &amp; Tomás ·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4" draw:text-style-name="P4" draw:layer="layout" svg:width="1.267cm" svg:height="0.696cm" svg:x="23.876cm" svg:y="13.589cm">
          <text:p text:style-name="P3"><text:span text:style-name="T13">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5" draw:text-style-name="P20" draw:layer="layout" svg:width="11.427cm" svg:height="0.962cm" svg:x="1.016cm" svg:y="2.54cm">
          <text:p text:style-name="P19"><text:span text:style-name="T14">Motivació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6" draw:text-style-name="P24" draw:layer="layout" svg:width="11.681cm" svg:height="2.918cm" svg:x="1.016cm" svg:y="3.505cm">
          <text:list text:style-name="L9">
            <text:list-item>
              <text:p text:style-name="P23"><text:span text:style-name="T15">Clonado funcional de Agapea.com como referencia real de e-commerce de libros</text:span></text:p>
            </text:list-item>
            <text:list-item>
              <text:p text:style-name="P23"><text:span text:style-name="T15">Sector librerías independientes con escasa presencia digital</text:span></text:p>
            </text:list-item>
            <text:list-item>
              <text:p text:style-name="P23"><text:span text:style-name="T15">Aplicabilidad directa en el mercado laboral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7" draw:text-style-name="P20" draw:layer="layout" svg:width="11.427cm" svg:height="0.962cm" svg:x="1.016cm" svg:y="6.731cm">
          <text:p text:style-name="P19"><text:span text:style-name="T14">Objetivo Principa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48" draw:text-style-name="P24" draw:layer="layout" svg:width="11.681cm" svg:height="2.664cm" svg:x="1.016cm" svg:y="7.696cm">
          <text:list text:style-name="L9">
            <text:list-item>
              <text:p text:style-name="P23"><text:span text:style-name="T15">Arquitectura desacoplada: frontend independiente del backend</text:span></text:p>
            </text:list-item>
            <text:list-item>
              <text:p text:style-name="P23"><text:span text:style-name="T15">API REST propia con Laravel</text:span></text:p>
            </text:list-item>
            <text:list-item>
              <text:p text:style-name="P23"><text:span text:style-name="T15">Interfaz funcional para clientes y administradores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9" draw:text-style-name="P25" draw:layer="layout" svg:width="0.073cm" svg:height="8.125cm" svg:x="13.208cm" svg:y="2.54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50" draw:text-style-name="P20" draw:layer="layout" svg:width="10.665cm" svg:height="0.962cm" svg:x="13.716cm" svg:y="2.54cm">
          <text:p text:style-name="P19"><text:span text:style-name="T14">Tipos de Usuari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51" draw:text-style-name="P26" draw:layer="layout" svg:width="10.411cm" svg:height="1.826cm" svg:x="13.716cm" svg:y="3.81cm">
          <text:p text:style-name="P1"><text:span text:style-name="T16"/></text:p>
          <draw:enhanced-geometry draw:mirror-horizontal="false" draw:mirror-vertical="false" draw:glue-points="?f8 0 0 ?f9 ?f8 ?f10 ?f11 ?f9" draw:text-areas="?f5 ?f5 ?f6 ?f7" svg:viewBox="0 0 0 0" draw:type="ooxml-roundRect" draw:modifiers="972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13" draw:style-name="gr52" draw:text-style-name="P20" draw:layer="layout" svg:width="10.157cm" svg:height="0.81cm" svg:x="14.097cm" svg:y="3.81cm">
          <text:p text:style-name="P19"><text:span text:style-name="T17">👁 <text:s/>Visitant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53" draw:text-style-name="P20" draw:layer="layout" svg:width="10.157cm" svg:height="0.759cm" svg:x="14.097cm" svg:y="4.623cm">
          <text:p text:style-name="P19"><text:span text:style-name="T18">Acceso de solo lectura al catálogo públic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51" draw:text-style-name="P26" draw:layer="layout" svg:width="10.411cm" svg:height="1.826cm" svg:x="13.716cm" svg:y="6.045cm">
          <text:p text:style-name="P1"><text:span text:style-name="T16"/></text:p>
          <draw:enhanced-geometry draw:mirror-horizontal="false" draw:mirror-vertical="false" draw:glue-points="?f8 0 0 ?f9 ?f8 ?f10 ?f11 ?f9" draw:text-areas="?f5 ?f5 ?f6 ?f7" svg:viewBox="0 0 0 0" draw:type="ooxml-roundRect" draw:modifiers="972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16" draw:style-name="gr54" draw:text-style-name="P20" draw:layer="layout" svg:width="10.157cm" svg:height="0.81cm" svg:x="14.097cm" svg:y="6.045cm">
          <text:p text:style-name="P19"><text:span text:style-name="T17">🛒 <text:s/>Client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55" draw:text-style-name="P20" draw:layer="layout" svg:width="10.157cm" svg:height="0.759cm" svg:x="14.097cm" svg:y="6.858cm">
          <text:p text:style-name="P19"><text:span text:style-name="T18">Carrito, favoritos, reseñas y pedid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51" draw:text-style-name="P26" draw:layer="layout" svg:width="10.411cm" svg:height="1.826cm" svg:x="13.716cm" svg:y="8.28cm">
          <text:p text:style-name="P1"><text:span text:style-name="T16"/></text:p>
          <draw:enhanced-geometry draw:mirror-horizontal="false" draw:mirror-vertical="false" draw:glue-points="?f8 0 0 ?f9 ?f8 ?f10 ?f11 ?f9" draw:text-areas="?f5 ?f5 ?f6 ?f7" svg:viewBox="0 0 0 0" draw:type="ooxml-roundRect" draw:modifiers="972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19" draw:style-name="gr56" draw:text-style-name="P20" draw:layer="layout" svg:width="10.157cm" svg:height="0.81cm" svg:x="14.097cm" svg:y="8.28cm">
          <text:p text:style-name="P19"><text:span text:style-name="T17">⚙️ <text:s/>Administrado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7" draw:text-style-name="P20" draw:layer="layout" svg:width="10.157cm" svg:height="0.759cm" svg:x="14.097cm" svg:y="9.093cm">
          <text:p text:style-name="P19"><text:span text:style-name="T18">Panel CRUD: libros, pedidos, usuarios, cupon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0" draw:layer="layout" svg:width="15.237cm" svg:height="8.57cm" svg:x="1.905cm" svg:y="3.175cm" draw:page-number="3" presentation:class="page"/>
          <draw:frame draw:name="PlaceHolder 2" presentation:style-name="pr5" draw:text-style-name="P6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4" draw:text-style-name="P8" draw:layer="layout" svg:width="8.252cm" svg:height="1.271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4" draw:style-name="dp3" draw:master-page-name="Predeterminado">
        <draw:custom-shape draw:name="GoldBar" draw:style-name="gr1" draw:text-style-name="P2" draw:layer="layout" svg:width="0.149cm" svg:height="1.394cm" svg:x="1.016cm" svg:y="0.55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" draw:style-name="gr58" draw:text-style-name="P11" draw:layer="layout" svg:width="23.111cm" svg:height="1.648cm" svg:x="1.397cm" svg:y="0.457cm">
          <text:p text:style-name="P10"><text:span text:style-name="T8">Requisitos Funcionales y Técnic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Divider" draw:style-name="gr12" draw:text-style-name="P21" draw:layer="layout" svg:x1="1.016cm" svg:y1="2.159cm" svg:x2="24.384cm" svg:y2="2.16cm">
          <text:p/>
        </draw:line>
        <draw:custom-shape draw:name="Subtitle" draw:style-name="gr59" draw:text-style-name="P21" draw:layer="layout" svg:width="23.366cm" svg:height="0.633cm" svg:x="1.016cm" svg:y="2.28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BG0" draw:style-name="gr13" draw:text-style-name="P26" draw:layer="layout" svg:width="11.174cm" svg:height="1.556cm" svg:x="1.016cm" svg:y="3.048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Text0" draw:style-name="gr60" draw:text-style-name="P17" draw:layer="layout" svg:width="7.24cm" svg:height="1.556cm" svg:x="1.397cm" svg:y="3.048cm">
          <text:p text:style-name="P1"><text:span text:style-name="T19">Validación de formularios</text:span></text:p>
          <text:p text:style-name="P1"><text:span text:style-name="T20">JS nativo + reglas Laravel en backen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Badge0" draw:style-name="gr61" draw:text-style-name="P27" draw:layer="layout" svg:width="3.043cm" svg:height="0.76cm" svg:x="8.893cm" svg:y="3.446cm">
          <text:p text:style-name="P14"><text:span text:style-name="T21">✓ Implementado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CardBG1" draw:style-name="gr13" draw:text-style-name="P26" draw:layer="layout" svg:width="11.174cm" svg:height="1.556cm" svg:x="1.016cm" svg:y="4.793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Text1" draw:style-name="gr62" draw:text-style-name="P17" draw:layer="layout" svg:width="7.24cm" svg:height="1.556cm" svg:x="1.397cm" svg:y="4.793cm">
          <text:p text:style-name="P1"><text:span text:style-name="T19">Peticiones asíncronas a API (JSON)</text:span></text:p>
          <text:p text:style-name="P1"><text:span text:style-name="T20">fetch + async/await → /api/v1/ en JS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Badge1" draw:style-name="gr63" draw:text-style-name="P27" draw:layer="layout" svg:width="3.043cm" svg:height="0.76cm" svg:x="8.893cm" svg:y="5.191cm">
          <text:p text:style-name="P14"><text:span text:style-name="T21">✓ Implementado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CardBG2" draw:style-name="gr13" draw:text-style-name="P26" draw:layer="layout" svg:width="11.174cm" svg:height="1.556cm" svg:x="1.016cm" svg:y="6.538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Text2" draw:style-name="gr64" draw:text-style-name="P17" draw:layer="layout" svg:width="7.24cm" svg:height="1.556cm" svg:x="1.397cm" svg:y="6.538cm">
          <text:p text:style-name="P1"><text:span text:style-name="T19">Búsqueda y filtrado de datos JSON</text:span></text:p>
          <text:p text:style-name="P1"><text:span text:style-name="T20">?search= ?category= ?sort= — lado servido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Badge2" draw:style-name="gr65" draw:text-style-name="P27" draw:layer="layout" svg:width="3.043cm" svg:height="0.76cm" svg:x="8.893cm" svg:y="6.936cm">
          <text:p text:style-name="P14"><text:span text:style-name="T21">✓ Implementado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CardBG3" draw:style-name="gr13" draw:text-style-name="P26" draw:layer="layout" svg:width="11.174cm" svg:height="1.556cm" svg:x="1.016cm" svg:y="8.283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Text3" draw:style-name="gr66" draw:text-style-name="P17" draw:layer="layout" svg:width="7.24cm" svg:height="1.556cm" svg:x="1.397cm" svg:y="8.283cm">
          <text:p text:style-name="P1"><text:span text:style-name="T19">Paginación de elementos</text:span></text:p>
          <text:p text:style-name="P1"><text:span text:style-name="T20">Objeto meta del backend → controles dinámicos J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Badge3" draw:style-name="gr67" draw:text-style-name="P27" draw:layer="layout" svg:width="3.043cm" svg:height="0.76cm" svg:x="8.893cm" svg:y="8.681cm">
          <text:p text:style-name="P14"><text:span text:style-name="T21">✓ Implementado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CardBG4" draw:style-name="gr13" draw:text-style-name="P26" draw:layer="layout" svg:width="11.174cm" svg:height="1.556cm" svg:x="1.016cm" svg:y="10.028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Text4" draw:style-name="gr68" draw:text-style-name="P17" draw:layer="layout" svg:width="7.24cm" svg:height="1.556cm" svg:x="1.397cm" svg:y="10.028cm">
          <text:p text:style-name="P1"><text:span text:style-name="T19">Persistencia en localStorage</text:span></text:p>
          <text:p text:style-name="P1"><text:span text:style-name="T20">Carrito, favoritos, token y usuario en navegado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Badge4" draw:style-name="gr69" draw:text-style-name="P27" draw:layer="layout" svg:width="3.043cm" svg:height="0.76cm" svg:x="8.893cm" svg:y="10.426cm">
          <text:p text:style-name="P14"><text:span text:style-name="T21">✓ Implementado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CardBG5" draw:style-name="gr13" draw:text-style-name="P26" draw:layer="layout" svg:width="11.174cm" svg:height="1.556cm" svg:x="13.208cm" svg:y="3.048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Text5" draw:style-name="gr70" draw:text-style-name="P17" draw:layer="layout" svg:width="7.24cm" svg:height="1.556cm" svg:x="13.589cm" svg:y="3.048cm">
          <text:p text:style-name="P1"><text:span text:style-name="T19">Persistencia en base de datos</text:span></text:p>
          <text:p text:style-name="P1"><text:span text:style-name="T20">Catálogo, usuarios y pedidos en MySQL/Eloquen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Badge5" draw:style-name="gr71" draw:text-style-name="P27" draw:layer="layout" svg:width="3.043cm" svg:height="0.76cm" svg:x="21.085cm" svg:y="3.446cm">
          <text:p text:style-name="P14"><text:span text:style-name="T21">✓ Implementado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CardBG6" draw:style-name="gr13" draw:text-style-name="P26" draw:layer="layout" svg:width="11.174cm" svg:height="1.556cm" svg:x="13.208cm" svg:y="4.793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Text6" draw:style-name="gr72" draw:text-style-name="P17" draw:layer="layout" svg:width="7.24cm" svg:height="1.556cm" svg:x="13.589cm" svg:y="4.793cm">
          <text:p text:style-name="P1"><text:span text:style-name="T19">Front Office (parte pública)</text:span></text:p>
          <text:p text:style-name="P1"><text:span text:style-name="T20">MPA: catálogo, carrito, login, favoritos, reseña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Badge6" draw:style-name="gr73" draw:text-style-name="P27" draw:layer="layout" svg:width="3.043cm" svg:height="0.76cm" svg:x="21.085cm" svg:y="5.191cm">
          <text:p text:style-name="P14"><text:span text:style-name="T21">✓ Implementado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CardBG7" draw:style-name="gr13" draw:text-style-name="P26" draw:layer="layout" svg:width="11.174cm" svg:height="1.556cm" svg:x="13.208cm" svg:y="6.538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Text7" draw:style-name="gr74" draw:text-style-name="P17" draw:layer="layout" svg:width="7.24cm" svg:height="1.556cm" svg:x="13.589cm" svg:y="6.538cm">
          <text:p text:style-name="P1"><text:span text:style-name="T19">Back Office (administración)</text:span></text:p>
          <text:p text:style-name="P1"><text:span text:style-name="T20">SPA con CRUD completo de todos los recurs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Badge7" draw:style-name="gr75" draw:text-style-name="P27" draw:layer="layout" svg:width="3.043cm" svg:height="0.76cm" svg:x="21.085cm" svg:y="6.936cm">
          <text:p text:style-name="P14"><text:span text:style-name="T21">✓ Implementado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CardBG8" draw:style-name="gr13" draw:text-style-name="P26" draw:layer="layout" svg:width="11.174cm" svg:height="1.556cm" svg:x="13.208cm" svg:y="8.283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Text8" draw:style-name="gr76" draw:text-style-name="P17" draw:layer="layout" svg:width="7.24cm" svg:height="1.556cm" svg:x="13.589cm" svg:y="8.283cm">
          <text:p text:style-name="P1"><text:span text:style-name="T19">CRUD completo</text:span></text:p>
          <text:p text:style-name="P1"><text:span text:style-name="T20">Crear, leer, actualizar y eliminar en todos los recurs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Badge8" draw:style-name="gr77" draw:text-style-name="P27" draw:layer="layout" svg:width="3.043cm" svg:height="0.76cm" svg:x="21.085cm" svg:y="8.681cm">
          <text:p text:style-name="P14"><text:span text:style-name="T21">✓ Implementado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CardBG9" draw:style-name="gr13" draw:text-style-name="P26" draw:layer="layout" svg:width="11.174cm" svg:height="1.556cm" svg:x="13.208cm" svg:y="10.028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Text9" draw:style-name="gr78" draw:text-style-name="P17" draw:layer="layout" svg:width="7.24cm" svg:height="1.556cm" svg:x="13.589cm" svg:y="10.028cm">
          <text:p text:style-name="P1"><text:span text:style-name="T19">Autenticación por token</text:span></text:p>
          <text:p text:style-name="P1"><text:span text:style-name="T20">Laravel Sanctum — Bearer Token en localStorag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Badge9" draw:style-name="gr79" draw:text-style-name="P27" draw:layer="layout" svg:width="3.043cm" svg:height="0.76cm" svg:x="21.085cm" svg:y="10.426cm">
          <text:p text:style-name="P14"><text:span text:style-name="T21">✓ Implementado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FooterBar" draw:style-name="gr39" draw:text-style-name="P22" draw:layer="layout" svg:width="25.397cm" svg:height="0.696cm" svg:x="0cm" svg:y="13.58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Text" draw:style-name="gr80" draw:text-style-name="P17" draw:layer="layout" svg:width="17.777cm" svg:height="0.696cm" svg:x="0.762cm" svg:y="13.589cm">
          <text:p text:style-name="P1"><text:span text:style-name="T11">Clon de Agapea · Richard &amp; Tomás ·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geNum" draw:style-name="gr81" draw:text-style-name="P15" draw:layer="layout" svg:width="1.267cm" svg:height="0.696cm" svg:x="23.877cm" svg:y="13.589cm">
          <text:p text:style-name="P14"><text:span text:style-name="T11">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0" draw:layer="layout" svg:width="14.287cm" svg:height="8.036cm" svg:x="0cm" svg:y="2.674cm" draw:page-number="4" presentation:class="page"/>
          <draw:frame presentation:style-name="pr6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>
        <draw:custom-shape draw:name="Shape 0" draw:style-name="gr1" draw:text-style-name="P2" draw:layer="layout" svg:width="0.149cm" svg:height="1.394cm" svg:x="1.016cm" svg:y="0.55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82" draw:text-style-name="P20" draw:layer="layout" svg:width="23.111cm" svg:height="1.648cm" svg:x="1.397cm" svg:y="0.457cm">
          <text:p text:style-name="P19"><text:span text:style-name="T12">Arquitectura del Sistem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" draw:style-name="gr12" draw:text-style-name="P21" draw:layer="layout" svg:x1="1.016cm" svg:y1="2.159cm" svg:x2="24.384cm" svg:y2="2.16cm">
          <text:p/>
        </draw:line>
        <draw:custom-shape draw:name="Shape 3" draw:style-name="gr39" draw:text-style-name="P22" draw:layer="layout" svg:width="25.397cm" svg:height="0.696cm" svg:x="0cm" svg:y="13.58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83" draw:text-style-name="P20" draw:layer="layout" svg:width="17.777cm" svg:height="0.696cm" svg:x="0.762cm" svg:y="13.589cm">
          <text:p text:style-name="P19"><text:span text:style-name="T13">Clon de Agapea · Richard &amp; Tomás ·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84" draw:text-style-name="P4" draw:layer="layout" svg:width="1.267cm" svg:height="0.696cm" svg:x="23.876cm" svg:y="13.589cm">
          <text:p text:style-name="P3"><text:span text:style-name="T13">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85" draw:text-style-name="P20" draw:layer="layout" svg:width="10.411cm" svg:height="0.962cm" svg:x="14cm" svg:y="2.107cm">
          <text:p text:style-name="P19"><text:span text:style-name="T22">Arquitectura Headless (Desacoplada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86" draw:text-style-name="P24" draw:layer="layout" svg:width="10.411cm" svg:height="3.426cm" svg:x="13.97cm" svg:y="3.607cm">
          <text:list text:style-name="L9">
            <text:list-item>
              <text:p text:style-name="P23"><text:span text:style-name="T15">Frontend y backend son proyectos independientes</text:span></text:p>
            </text:list-item>
            <text:list-item>
              <text:p text:style-name="P23"><text:span text:style-name="T15">Comunicación exclusiva por HTTP + JSON</text:span></text:p>
            </text:list-item>
            <text:list-item>
              <text:p text:style-name="P23"><text:span text:style-name="T15">Backend patrón MVC (Laravel): la vista es JSON</text:span></text:p>
            </text:list-item>
            <text:list-item>
              <text:p text:style-name="P23"><text:span text:style-name="T15">Token Bearer gestionado por Laravel Sanctum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87" draw:layer="layout" svg:width="10.667cm" svg:height="3.809cm" svg:x="13.749cm" svg:y="8.057cm">
          <table:table>
            <table:table-column table:style-name="co1"/>
            <table:table-column table:style-name="co2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3"><text:span text:style-name="T23">Front Office</text:span></text:p>
              </table:table-cell>
              <table:table-cell>
                <text:p text:style-name="P3"><text:span text:style-name="T23">Back Office</text:span></text:p>
              </table:table-cell>
            </table:table-row>
            <table:table-row table:style-name="ro2" table:default-cell-style-name="ce3">
              <table:table-cell>
                <text:p text:style-name="P19"><text:span text:style-name="T24">Tipo</text:span></text:p>
              </table:table-cell>
              <table:table-cell>
                <text:p text:style-name="P19"><text:span text:style-name="T24">MPA</text:span></text:p>
              </table:table-cell>
              <table:table-cell>
                <text:p text:style-name="P19"><text:span text:style-name="T24">SPA</text:span></text:p>
              </table:table-cell>
            </table:table-row>
            <table:table-row table:style-name="ro2" table:default-cell-style-name="ce3">
              <table:table-cell>
                <text:p text:style-name="P19"><text:span text:style-name="T24">Carpeta</text:span></text:p>
              </table:table-cell>
              <table:table-cell>
                <text:p text:style-name="P19"><text:span text:style-name="T24">agapea-frontend/</text:span></text:p>
              </table:table-cell>
              <table:table-cell>
                <text:p text:style-name="P19"><text:span text:style-name="T24">adm-agapea/</text:span></text:p>
              </table:table-cell>
            </table:table-row>
            <table:table-row table:style-name="ro2" table:default-cell-style-name="ce3">
              <table:table-cell>
                <text:p text:style-name="P19"><text:span text:style-name="T24">Stack</text:span></text:p>
              </table:table-cell>
              <table:table-cell>
                <text:p text:style-name="P19"><text:span text:style-name="T24">Vanilla JS · HTML</text:span></text:p>
              </table:table-cell>
              <table:table-cell>
                <text:p text:style-name="P19"><text:span text:style-name="T24">Vanilla JS · Router JS</text:span></text:p>
              </table:table-cell>
            </table:table-row>
            <table:table-row table:style-name="ro3" table:default-cell-style-name="ce3">
              <table:table-cell>
                <text:p text:style-name="P19"><text:span text:style-name="T24">Usuarios</text:span></text:p>
              </table:table-cell>
              <table:table-cell>
                <text:p text:style-name="P19"><text:span text:style-name="T24">Clientes / Visitantes</text:span></text:p>
              </table:table-cell>
              <table:table-cell>
                <text:p text:style-name="P19"><text:span text:style-name="T24">Administradore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8" draw:text-style-name="P29" draw:layer="layout" svg:width="12cm" svg:height="9.037cm" svg:x="1cm" svg:y="2.963cm">
          <draw:image xlink:href="Pictures/1000000000000347000001AB01A6D5F1.jpg" xlink:type="simple" xlink:show="embed" xlink:actuate="onLoad" draw:mime-type="image/jpeg">
            <text:p/>
          </draw:image>
        </draw:frame>
        <presentation:notes draw:style-name="dp2">
          <draw:page-thumbnail draw:name="PlaceHolder 1" draw:style-name="gr10" draw:layer="layout" svg:width="15.237cm" svg:height="8.57cm" svg:x="1.905cm" svg:y="3.175cm" draw:page-number="5" presentation:class="page"/>
          <draw:frame draw:name="PlaceHolder 2" presentation:style-name="pr7" draw:text-style-name="P6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4" draw:text-style-name="P8" draw:layer="layout" svg:width="8.252cm" svg:height="1.271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6" draw:style-name="dp3" draw:master-page-name="Predeterminado">
        <draw:custom-shape draw:name="GoldBar" draw:style-name="gr1" draw:text-style-name="P30" draw:layer="layout" svg:width="0.149cm" svg:height="1.394cm" svg:x="1.016cm" svg:y="0.559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" draw:style-name="gr89" draw:text-style-name="P11" draw:layer="layout" svg:width="23.111cm" svg:height="1.648cm" svg:x="1.397cm" svg:y="0.457cm">
          <text:p text:style-name="P10"><text:span text:style-name="T8">Stack Tecnológic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Divider" draw:style-name="gr12" draw:text-style-name="P21" draw:layer="layout" svg:x1="1.016cm" svg:y1="2.159cm" svg:x2="24.384cm" svg:y2="2.16cm">
          <text:p/>
        </draw:line>
        <draw:custom-shape draw:name="SecHdr" draw:style-name="gr90" draw:text-style-name="P31" draw:layer="layout" svg:width="11.174cm" svg:height="0.886cm" svg:x="1.016cm" svg:y="2.413cm">
          <text:p text:style-name="P1"><text:span text:style-name="T25">Fronten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cHdr" draw:style-name="gr91" draw:text-style-name="P32" draw:layer="layout" svg:width="11.174cm" svg:height="0.886cm" svg:x="13.208cm" svg:y="2.413cm">
          <text:p text:style-name="P1"><text:span text:style-name="T25">Backen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BG" draw:style-name="gr13" draw:text-style-name="P26" draw:layer="layout" svg:width="11.174cm" svg:height="1.523cm" svg:x="1.016cm" svg:y="3.455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Txt" draw:style-name="gr92" draw:text-style-name="P17" draw:layer="layout" svg:width="10.92cm" svg:height="1.523cm" svg:x="1.27cm" svg:y="3.455cm">
          <text:p text:style-name="P1"><text:span text:style-name="T19">HTML5 + CSS3</text:span></text:p>
          <text:p text:style-name="P1"><text:span text:style-name="T26">Estructura y estilos — </text:span><text:span text:style-name="T27">Control total sin dependencias externa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BG" draw:style-name="gr13" draw:text-style-name="P26" draw:layer="layout" svg:width="11.174cm" svg:height="1.523cm" svg:x="1.016cm" svg:y="5.11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Txt" draw:style-name="gr93" draw:text-style-name="P17" draw:layer="layout" svg:width="10.92cm" svg:height="1.523cm" svg:x="1.27cm" svg:y="5.11cm">
          <text:p text:style-name="P1"><text:span text:style-name="T19">JavaScript Vanilla ES6+</text:span></text:p>
          <text:p text:style-name="P1"><text:span text:style-name="T26">Lógica de interfaz — </text:span><text:span text:style-name="T27">Módulos, fetch, async/await, DOM — sin framewor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BG" draw:style-name="gr13" draw:text-style-name="P26" draw:layer="layout" svg:width="11.174cm" svg:height="1.523cm" svg:x="1.016cm" svg:y="6.765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Txt" draw:style-name="gr94" draw:text-style-name="P17" draw:layer="layout" svg:width="10.92cm" svg:height="1.523cm" svg:x="1.27cm" svg:y="6.765cm">
          <text:p text:style-name="P1"><text:span text:style-name="T19">Chart.js</text:span></text:p>
          <text:p text:style-name="P1"><text:span text:style-name="T26">Visualización de datos — </text:span><text:span text:style-name="T27">Librería ligera integrada vía CD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BG" draw:style-name="gr13" draw:text-style-name="P26" draw:layer="layout" svg:width="11.174cm" svg:height="1.523cm" svg:x="1.016cm" svg:y="8.42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Txt" draw:style-name="gr95" draw:text-style-name="P17" draw:layer="layout" svg:width="10.92cm" svg:height="1.523cm" svg:x="1.27cm" svg:y="8.42cm">
          <text:p text:style-name="P1"><text:span text:style-name="T19">SweetAlert2</text:span></text:p>
          <text:p text:style-name="P1"><text:span text:style-name="T26">Alertas y confirmaciones — </text:span><text:span text:style-name="T27">Reemplaza diálogos nativos por modales estilizad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BG" draw:style-name="gr13" draw:text-style-name="P26" draw:layer="layout" svg:width="11.174cm" svg:height="1.523cm" svg:x="1.016cm" svg:y="10.075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Txt" draw:style-name="gr96" draw:text-style-name="P17" draw:layer="layout" svg:width="10.92cm" svg:height="1.523cm" svg:x="1.27cm" svg:y="10.075cm">
          <text:p text:style-name="P1"><text:span text:style-name="T19">FontAwesome</text:span></text:p>
          <text:p text:style-name="P1"><text:span text:style-name="T26">Iconografía — </text:span><text:span text:style-name="T27">Iconos vectoriales vía CDN, sin configuració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BG" draw:style-name="gr97" draw:text-style-name="P33" draw:layer="layout" svg:width="11.174cm" svg:height="1.523cm" svg:x="1.016cm" svg:y="11.73cm">
          <text:p text:style-name="P1"><text:span text:style-name="T16"><text:s/></text:span><text:span text:style-name="T16"><text:tab/>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Txt" draw:style-name="gr98" draw:text-style-name="P17" draw:layer="layout" svg:width="10.92cm" svg:height="1.523cm" svg:x="1.27cm" svg:y="11.73cm">
          <text:p text:style-name="P1"><text:span text:style-name="T19">Visual Studio Code</text:span></text:p>
          <text:p text:style-name="P1"><text:span text:style-name="T26">Editor + servidor dev — </text:span><text:span text:style-name="T27">Live Server: HTML estáticos en local con recarga automátic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BG" draw:style-name="gr13" draw:text-style-name="P26" draw:layer="layout" svg:width="11.174cm" svg:height="1.523cm" svg:x="13.208cm" svg:y="3.455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Txt" draw:style-name="gr99" draw:text-style-name="P17" draw:layer="layout" svg:width="10.92cm" svg:height="1.523cm" svg:x="13.462cm" svg:y="3.455cm">
          <text:p text:style-name="P1"><text:span text:style-name="T19">Laravel (PHP 8.x)</text:span></text:p>
          <text:p text:style-name="P1"><text:span text:style-name="T26">Framework del backend — </text:span><text:span text:style-name="T27">MVC estricto, Eloquent ORM, Sanctum — indicado por el profesorad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BG" draw:style-name="gr13" draw:text-style-name="P26" draw:layer="layout" svg:width="11.174cm" svg:height="1.523cm" svg:x="13.208cm" svg:y="5.11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Txt" draw:style-name="gr100" draw:text-style-name="P17" draw:layer="layout" svg:width="10.92cm" svg:height="1.523cm" svg:x="13.462cm" svg:y="5.11cm">
          <text:p text:style-name="P1"><text:span text:style-name="T19">Laravel Sanctum</text:span></text:p>
          <text:p text:style-name="P1"><text:span text:style-name="T26">Autenticación API — </text:span><text:span text:style-name="T27">Stateless: tokens Bearer para clientes y admin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BG" draw:style-name="gr13" draw:text-style-name="P26" draw:layer="layout" svg:width="11.174cm" svg:height="1.523cm" svg:x="13.208cm" svg:y="6.765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Txt" draw:style-name="gr101" draw:text-style-name="P17" draw:layer="layout" svg:width="10.92cm" svg:height="1.523cm" svg:x="13.462cm" svg:y="6.765cm">
          <text:p text:style-name="P1"><text:span text:style-name="T19">MySQL / MariaDB</text:span></text:p>
          <text:p text:style-name="P1"><text:span text:style-name="T26">Base de datos — </text:span><text:span text:style-name="T27">Relacional, incluida en el programa, compatible con Larave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BG" draw:style-name="gr13" draw:text-style-name="P26" draw:layer="layout" svg:width="11.174cm" svg:height="1.523cm" svg:x="13.208cm" svg:y="8.42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Txt" draw:style-name="gr102" draw:text-style-name="P17" draw:layer="layout" svg:width="10.92cm" svg:height="1.523cm" svg:x="13.462cm" svg:y="8.42cm">
          <text:p text:style-name="P1"><text:span text:style-name="T19">Composer</text:span></text:p>
          <text:p text:style-name="P1"><text:span text:style-name="T26">Gestor de paquetes PHP — </text:span><text:span text:style-name="T27">Estándar del ecosistema PHP para dependencia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BG" draw:style-name="gr13" draw:text-style-name="P26" draw:layer="layout" svg:width="11.174cm" svg:height="1.523cm" svg:x="13.208cm" svg:y="10.075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Txt" draw:style-name="gr103" draw:text-style-name="P17" draw:layer="layout" svg:width="10.92cm" svg:height="1.523cm" svg:x="13.462cm" svg:y="10.075cm">
          <text:p text:style-name="P1"><text:span text:style-name="T19">Antigravity</text:span></text:p>
          <text:p text:style-name="P1"><text:span text:style-name="T26">Scaffolding con IA — </text:span><text:span text:style-name="T27">Generación asistida de modelos, migraciones y controlador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BG" draw:style-name="gr13" draw:text-style-name="P26" draw:layer="layout" svg:width="11.174cm" svg:height="1.523cm" svg:x="13.208cm" svg:y="11.73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rdTxt" draw:style-name="gr104" draw:text-style-name="P17" draw:layer="layout" svg:width="10.92cm" svg:height="1.523cm" svg:x="13.462cm" svg:y="11.73cm">
          <text:p text:style-name="P1"><text:span text:style-name="T19">XAMPP</text:span></text:p>
          <text:p text:style-name="P1"><text:span text:style-name="T26">Entorno de desarrollo local — </text:span><text:span text:style-name="T27">Apache + PHP + MySQL en un instalador — Windows y Linux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Bar" draw:style-name="gr39" draw:text-style-name="P34" draw:layer="layout" svg:width="25.397cm" svg:height="0.696cm" svg:x="0cm" svg:y="13.589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Text" draw:style-name="gr105" draw:text-style-name="P17" draw:layer="layout" svg:width="17.777cm" svg:height="0.696cm" svg:x="0.762cm" svg:y="13.589cm">
          <text:p text:style-name="P1"><text:span text:style-name="T11">Clon de Agapea · Richard &amp; Tomás ·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geNum" draw:style-name="gr106" draw:text-style-name="P15" draw:layer="layout" svg:width="1.267cm" svg:height="0.696cm" svg:x="23.876cm" svg:y="13.589cm">
          <text:p text:style-name="P14"><text:span text:style-name="T11">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0" draw:layer="layout" svg:width="15.237cm" svg:height="8.57cm" svg:x="1.905cm" svg:y="3.175cm" draw:page-number="6" presentation:class="page"/>
          <draw:frame draw:name="PlaceHolder 2" presentation:style-name="pr8" draw:text-style-name="P6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4" draw:text-style-name="P8" draw:layer="layout" svg:width="8.252cm" svg:height="1.271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7" draw:style-name="dp3" draw:master-page-name="Predeterminado">
        <draw:custom-shape draw:name="Shape 0" draw:style-name="gr1" draw:text-style-name="P2" draw:layer="layout" svg:width="0.149cm" svg:height="1.394cm" svg:x="1.016cm" svg:y="0.55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07" draw:text-style-name="P20" draw:layer="layout" svg:width="23.111cm" svg:height="1.648cm" svg:x="1.397cm" svg:y="0.457cm">
          <text:p text:style-name="P19"><text:span text:style-name="T12">Diseño de Interfaces — Vista Principal (Home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" draw:style-name="gr12" draw:text-style-name="P21" draw:layer="layout" svg:x1="1.016cm" svg:y1="2.159cm" svg:x2="24.384cm" svg:y2="2.16cm">
          <text:p/>
        </draw:line>
        <draw:custom-shape draw:name="Shape 3" draw:style-name="gr39" draw:text-style-name="P22" draw:layer="layout" svg:width="25.397cm" svg:height="0.696cm" svg:x="0cm" svg:y="13.58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08" draw:text-style-name="P20" draw:layer="layout" svg:width="17.777cm" svg:height="0.696cm" svg:x="0.762cm" svg:y="13.589cm">
          <text:p text:style-name="P19"><text:span text:style-name="T13">Clon de Agapea · Richard &amp; Tomás ·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09" draw:text-style-name="P4" draw:layer="layout" svg:width="1.267cm" svg:height="0.696cm" svg:x="23.876cm" svg:y="13.589cm">
          <text:p text:style-name="P3"><text:span text:style-name="T13">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10" draw:text-style-name="P4" draw:layer="layout" svg:width="11.427cm" svg:height="0.81cm" svg:x="1.016cm" svg:y="2.413cm">
          <text:p text:style-name="P3"><text:span text:style-name="T28">Wirefram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11" draw:text-style-name="P35" draw:layer="layout" svg:width="11.427cm" svg:height="9.395cm" svg:x="1.016cm" svg:y="3.302cm">
          <draw:image xlink:href="Pictures/10000000000002CF00000313D661C2F3.jpg" xlink:type="simple" xlink:show="embed" xlink:actuate="onLoad" draw:mime-type="image/jpeg">
            <text:p/>
          </draw:image>
          <svg:desc>preencoded.png</svg:desc>
        </draw:frame>
        <draw:custom-shape draw:name="Text 7" draw:style-name="gr112" draw:text-style-name="P4" draw:layer="layout" svg:width="11.427cm" svg:height="0.81cm" svg:x="12.954cm" svg:y="2.413cm">
          <text:p text:style-name="P3"><text:span text:style-name="T29">Implementación Rea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11" draw:text-style-name="P35" draw:layer="layout" svg:width="11.427cm" svg:height="9.395cm" svg:x="12.954cm" svg:y="3.302cm">
          <draw:image xlink:href="Pictures/100000000000027200000273AE34944E.jpg" xlink:type="simple" xlink:show="embed" xlink:actuate="onLoad" draw:mime-type="image/jpeg">
            <text:p/>
          </draw:image>
          <svg:desc>preencoded.png</svg:desc>
        </draw:frame>
        <presentation:notes draw:style-name="dp2">
          <draw:page-thumbnail draw:name="PlaceHolder 1" draw:style-name="gr10" draw:layer="layout" svg:width="15.237cm" svg:height="8.57cm" svg:x="1.905cm" svg:y="3.175cm" draw:page-number="7" presentation:class="page"/>
          <draw:frame draw:name="PlaceHolder 2" presentation:style-name="pr9" draw:text-style-name="P6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4" draw:text-style-name="P8" draw:layer="layout" svg:width="8.252cm" svg:height="1.271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8" draw:style-name="dp3" draw:master-page-name="Predeterminado">
        <draw:custom-shape draw:name="Shape 0" draw:style-name="gr1" draw:text-style-name="P2" draw:layer="layout" svg:width="0.149cm" svg:height="1.394cm" svg:x="1.016cm" svg:y="0.55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13" draw:text-style-name="P20" draw:layer="layout" svg:width="23.111cm" svg:height="1.648cm" svg:x="1.397cm" svg:y="0.457cm">
          <text:p text:style-name="P19"><text:span text:style-name="T12">Diseño de Interfaces — Vista Detalle de Libr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" draw:style-name="gr12" draw:text-style-name="P21" draw:layer="layout" svg:x1="1.016cm" svg:y1="2.159cm" svg:x2="24.384cm" svg:y2="2.16cm">
          <text:p/>
        </draw:line>
        <draw:custom-shape draw:name="Shape 3" draw:style-name="gr39" draw:text-style-name="P22" draw:layer="layout" svg:width="25.397cm" svg:height="0.696cm" svg:x="0cm" svg:y="13.58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14" draw:text-style-name="P20" draw:layer="layout" svg:width="17.777cm" svg:height="0.696cm" svg:x="0.762cm" svg:y="13.589cm">
          <text:p text:style-name="P19"><text:span text:style-name="T13">Clon de Agapea · Richard &amp; Tomás ·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15" draw:text-style-name="P4" draw:layer="layout" svg:width="1.267cm" svg:height="0.696cm" svg:x="23.876cm" svg:y="13.589cm">
          <text:p text:style-name="P3"><text:span text:style-name="T13">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16" draw:text-style-name="P4" draw:layer="layout" svg:width="11.427cm" svg:height="0.81cm" svg:x="1.016cm" svg:y="2.413cm">
          <text:p text:style-name="P3"><text:span text:style-name="T28">Wirefram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11" draw:text-style-name="P35" draw:layer="layout" svg:width="11.427cm" svg:height="9.395cm" svg:x="1.016cm" svg:y="3.302cm">
          <draw:image xlink:href="Pictures/10000000000002CE00000326006908FC.jpg" xlink:type="simple" xlink:show="embed" xlink:actuate="onLoad" draw:mime-type="image/jpeg">
            <text:p/>
          </draw:image>
          <svg:desc>preencoded.png</svg:desc>
        </draw:frame>
        <draw:custom-shape draw:name="Text 7" draw:style-name="gr117" draw:text-style-name="P4" draw:layer="layout" svg:width="11.427cm" svg:height="0.81cm" svg:x="12.954cm" svg:y="2.413cm">
          <text:p text:style-name="P3"><text:span text:style-name="T29">Implementación Rea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11" draw:text-style-name="P35" draw:layer="layout" svg:width="11.427cm" svg:height="9.395cm" svg:x="12.954cm" svg:y="3.302cm">
          <draw:image xlink:href="Pictures/10000000000002730000027796D0B349.jpg" xlink:type="simple" xlink:show="embed" xlink:actuate="onLoad" draw:mime-type="image/jpeg">
            <text:p/>
          </draw:image>
          <svg:desc>preencoded.png</svg:desc>
        </draw:frame>
        <presentation:notes draw:style-name="dp2">
          <draw:page-thumbnail draw:name="PlaceHolder 1" draw:style-name="gr10" draw:layer="layout" svg:width="15.237cm" svg:height="8.57cm" svg:x="1.905cm" svg:y="3.175cm" draw:page-number="8" presentation:class="page"/>
          <draw:frame draw:name="PlaceHolder 2" presentation:style-name="pr10" draw:text-style-name="P6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4" draw:text-style-name="P8" draw:layer="layout" svg:width="8.252cm" svg:height="1.271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9" draw:style-name="dp3" draw:master-page-name="Predeterminado">
        <draw:custom-shape draw:name="Shape 0" draw:style-name="gr1" draw:text-style-name="P2" draw:layer="layout" svg:width="0.149cm" svg:height="1.394cm" svg:x="1.016cm" svg:y="0.55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18" draw:text-style-name="P20" draw:layer="layout" svg:width="23.111cm" svg:height="1.648cm" svg:x="1.397cm" svg:y="0.457cm">
          <text:p text:style-name="P19"><text:span text:style-name="T12">Diseño de Interfaces — Panel de Administración (SPA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" draw:style-name="gr12" draw:text-style-name="P21" draw:layer="layout" svg:x1="1.016cm" svg:y1="2.159cm" svg:x2="24.384cm" svg:y2="2.16cm">
          <text:p/>
        </draw:line>
        <draw:custom-shape draw:name="Shape 3" draw:style-name="gr39" draw:text-style-name="P22" draw:layer="layout" svg:width="25.397cm" svg:height="0.696cm" svg:x="0cm" svg:y="13.58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19" draw:text-style-name="P20" draw:layer="layout" svg:width="17.777cm" svg:height="0.696cm" svg:x="0.762cm" svg:y="13.589cm">
          <text:p text:style-name="P19"><text:span text:style-name="T13">Clon de Agapea · Richard &amp; Tomás ·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20" draw:text-style-name="P4" draw:layer="layout" svg:width="1.267cm" svg:height="0.696cm" svg:x="23.876cm" svg:y="13.589cm">
          <text:p text:style-name="P3"><text:span text:style-name="T13">8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21" draw:text-style-name="P4" draw:layer="layout" svg:width="11.427cm" svg:height="0.81cm" svg:x="1.016cm" svg:y="2.413cm">
          <text:p text:style-name="P3"><text:span text:style-name="T28">Wirefram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11" draw:text-style-name="P35" draw:layer="layout" svg:width="11.427cm" svg:height="9.395cm" svg:x="1.016cm" svg:y="3.302cm">
          <draw:image xlink:href="Pictures/10000000000002690000024771466199.jpg" xlink:type="simple" xlink:show="embed" xlink:actuate="onLoad" draw:mime-type="image/jpeg">
            <text:p/>
          </draw:image>
          <svg:desc>preencoded.png</svg:desc>
        </draw:frame>
        <draw:custom-shape draw:name="Text 7" draw:style-name="gr122" draw:text-style-name="P4" draw:layer="layout" svg:width="11.427cm" svg:height="0.81cm" svg:x="12.954cm" svg:y="2.413cm">
          <text:p text:style-name="P3"><text:span text:style-name="T29">Implementación Rea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11" draw:text-style-name="P35" draw:layer="layout" svg:width="11.427cm" svg:height="9.395cm" svg:x="12.954cm" svg:y="3.302cm">
          <draw:image xlink:href="Pictures/10000000000004F900000279A90F9BF4.jpg" xlink:type="simple" xlink:show="embed" xlink:actuate="onLoad" draw:mime-type="image/jpeg">
            <text:p/>
          </draw:image>
          <svg:desc>preencoded.png</svg:desc>
        </draw:frame>
        <presentation:notes draw:style-name="dp2">
          <draw:page-thumbnail draw:name="PlaceHolder 1" draw:style-name="gr10" draw:layer="layout" svg:width="15.237cm" svg:height="8.57cm" svg:x="1.905cm" svg:y="3.175cm" draw:page-number="9" presentation:class="page"/>
          <draw:frame draw:name="PlaceHolder 2" presentation:style-name="pr11" draw:text-style-name="P6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4" draw:text-style-name="P8" draw:layer="layout" svg:width="8.252cm" svg:height="1.271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10" draw:style-name="dp3" draw:master-page-name="Predeterminado">
        <draw:custom-shape draw:name="Shape 0" draw:style-name="gr1" draw:text-style-name="P2" draw:layer="layout" svg:width="0.149cm" svg:height="1.394cm" svg:x="1.016cm" svg:y="0.55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23" draw:text-style-name="P20" draw:layer="layout" svg:width="23.111cm" svg:height="1.648cm" svg:x="1.397cm" svg:y="0.457cm">
          <text:p text:style-name="P19"><text:span text:style-name="T12">Base de Da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" draw:style-name="gr12" draw:text-style-name="P21" draw:layer="layout" svg:x1="1.016cm" svg:y1="2.159cm" svg:x2="24.384cm" svg:y2="2.16cm">
          <text:p/>
        </draw:line>
        <draw:custom-shape draw:name="Shape 3" draw:style-name="gr39" draw:text-style-name="P22" draw:layer="layout" svg:width="25.397cm" svg:height="0.696cm" svg:x="0cm" svg:y="13.58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24" draw:text-style-name="P20" draw:layer="layout" svg:width="17.777cm" svg:height="0.696cm" svg:x="0.762cm" svg:y="13.589cm">
          <text:p text:style-name="P19"><text:span text:style-name="T13">Clon de Agapea · Richard &amp; Tomás ·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25" draw:text-style-name="P4" draw:layer="layout" svg:width="1.267cm" svg:height="0.696cm" svg:x="23.876cm" svg:y="13.589cm">
          <text:p text:style-name="P3"><text:span text:style-name="T13">9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11" draw:text-style-name="P35" draw:layer="layout" svg:width="15.237cm" svg:height="9.903cm" svg:x="0.889cm" svg:y="2.413cm">
          <draw:image xlink:href="Pictures/100000010000200000001EC552695A35.png" xlink:type="simple" xlink:show="embed" xlink:actuate="onLoad" draw:mime-type="image/png">
            <text:p/>
          </draw:image>
          <svg:desc>preencoded.png</svg:desc>
        </draw:frame>
        <draw:custom-shape draw:name="Text 6" draw:style-name="gr126" draw:text-style-name="P20" draw:layer="layout" svg:width="7.871cm" svg:height="0.962cm" svg:x="16.637cm" svg:y="2.413cm">
          <text:p text:style-name="P19"><text:span text:style-name="T30">Tablas Principal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27" draw:text-style-name="P26" draw:layer="layout" svg:width="7.744cm" svg:height="1.115cm" svg:x="16.637cm" svg:y="3.556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28" draw:text-style-name="P20" draw:layer="layout" svg:width="7.363cm" svg:height="0.556cm" svg:x="16.967cm" svg:y="3.556cm">
          <text:p text:style-name="P19"><text:span text:style-name="T31">book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29" draw:text-style-name="P20" draw:layer="layout" svg:width="7.363cm" svg:height="0.454cm" svg:x="16.967cm" svg:y="4.115cm">
          <text:p text:style-name="P19"><text:span text:style-name="T32">Catálogo: precio, stock, ISBN, portad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27" draw:text-style-name="P26" draw:layer="layout" svg:width="7.744cm" svg:height="1.115cm" svg:x="16.637cm" svg:y="4.877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30" draw:text-style-name="P20" draw:layer="layout" svg:width="7.363cm" svg:height="0.556cm" svg:x="16.967cm" svg:y="4.877cm">
          <text:p text:style-name="P19"><text:span text:style-name="T31">customer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31" draw:text-style-name="P20" draw:layer="layout" svg:width="7.363cm" svg:height="0.454cm" svg:x="16.967cm" svg:y="5.436cm">
          <text:p text:style-name="P19"><text:span text:style-name="T32">Clientes con carrito en JS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27" draw:text-style-name="P26" draw:layer="layout" svg:width="7.744cm" svg:height="1.115cm" svg:x="16.637cm" svg:y="6.198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32" draw:text-style-name="P20" draw:layer="layout" svg:width="7.363cm" svg:height="0.556cm" svg:x="16.967cm" svg:y="6.198cm">
          <text:p text:style-name="P19"><text:span text:style-name="T31">orders / order_item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33" draw:text-style-name="P20" draw:layer="layout" svg:width="7.363cm" svg:height="0.454cm" svg:x="16.967cm" svg:y="6.756cm">
          <text:p text:style-name="P19"><text:span text:style-name="T32">Pedidos y líneas de detall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27" draw:text-style-name="P26" draw:layer="layout" svg:width="7.744cm" svg:height="1.115cm" svg:x="16.637cm" svg:y="7.518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34" draw:text-style-name="P20" draw:layer="layout" svg:width="7.363cm" svg:height="0.556cm" svg:x="16.967cm" svg:y="7.518cm">
          <text:p text:style-name="P19"><text:span text:style-name="T31">review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35" draw:text-style-name="P20" draw:layer="layout" svg:width="7.363cm" svg:height="0.454cm" svg:x="16.967cm" svg:y="8.077cm">
          <text:p text:style-name="P19"><text:span text:style-name="T32">Reseñas vinculadas a libro y client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27" draw:text-style-name="P26" draw:layer="layout" svg:width="7.744cm" svg:height="1.115cm" svg:x="16.637cm" svg:y="8.839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36" draw:text-style-name="P20" draw:layer="layout" svg:width="7.363cm" svg:height="0.556cm" svg:x="16.967cm" svg:y="8.839cm">
          <text:p text:style-name="P19"><text:span text:style-name="T31">favorit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37" draw:text-style-name="P20" draw:layer="layout" svg:width="7.363cm" svg:height="0.454cm" svg:x="16.967cm" svg:y="9.398cm">
          <text:p text:style-name="P19"><text:span text:style-name="T32">Tabla pivote cliente–libr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127" draw:text-style-name="P26" draw:layer="layout" svg:width="7.744cm" svg:height="1.115cm" svg:x="16.637cm" svg:y="10.16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38" draw:text-style-name="P20" draw:layer="layout" svg:width="7.363cm" svg:height="0.556cm" svg:x="16.967cm" svg:y="10.16cm">
          <text:p text:style-name="P19"><text:span text:style-name="T31">coupon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39" draw:text-style-name="P20" draw:layer="layout" svg:width="7.363cm" svg:height="0.454cm" svg:x="16.967cm" svg:y="10.719cm">
          <text:p text:style-name="P19"><text:span text:style-name="T32">Descuentos por códig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127" draw:text-style-name="P26" draw:layer="layout" svg:width="7.744cm" svg:height="1.115cm" svg:x="16.637cm" svg:y="11.481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140" draw:text-style-name="P20" draw:layer="layout" svg:width="7.363cm" svg:height="0.556cm" svg:x="16.967cm" svg:y="11.481cm">
          <text:p text:style-name="P19"><text:span text:style-name="T31">users / rol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141" draw:text-style-name="P20" draw:layer="layout" svg:width="7.363cm" svg:height="0.454cm" svg:x="16.967cm" svg:y="12.04cm">
          <text:p text:style-name="P19"><text:span text:style-name="T32">Administradores y permis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0" draw:layer="layout" svg:width="15.237cm" svg:height="8.57cm" svg:x="1.905cm" svg:y="3.175cm" draw:page-number="10" presentation:class="page"/>
          <draw:frame draw:name="PlaceHolder 2" presentation:style-name="pr12" draw:text-style-name="P6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4" draw:text-style-name="P8" draw:layer="layout" svg:width="8.252cm" svg:height="1.271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11" draw:style-name="dp3" draw:master-page-name="Predeterminado">
        <draw:custom-shape draw:name="Shape 0" draw:style-name="gr1" draw:text-style-name="P2" draw:layer="layout" svg:width="0.149cm" svg:height="1.394cm" svg:x="1.016cm" svg:y="0.55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42" draw:text-style-name="P20" draw:layer="layout" svg:width="23.111cm" svg:height="1.648cm" svg:x="1.397cm" svg:y="0.457cm">
          <text:p text:style-name="P19"><text:span text:style-name="T12">API RES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" draw:style-name="gr12" draw:text-style-name="P21" draw:layer="layout" svg:x1="1.016cm" svg:y1="2.159cm" svg:x2="24.384cm" svg:y2="2.16cm">
          <text:p/>
        </draw:line>
        <draw:custom-shape draw:name="Shape 3" draw:style-name="gr39" draw:text-style-name="P22" draw:layer="layout" svg:width="25.397cm" svg:height="0.696cm" svg:x="0cm" svg:y="13.58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43" draw:text-style-name="P20" draw:layer="layout" svg:width="17.777cm" svg:height="0.696cm" svg:x="0.762cm" svg:y="13.589cm">
          <text:p text:style-name="P19"><text:span text:style-name="T13">Clon de Agapea · Richard &amp; Tomás ·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44" draw:text-style-name="P4" draw:layer="layout" svg:width="1.267cm" svg:height="0.696cm" svg:x="23.876cm" svg:y="13.589cm">
          <text:p text:style-name="P3"><text:span text:style-name="T13">1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45" draw:text-style-name="P20" draw:layer="layout" svg:width="10.919cm" svg:height="0.911cm" svg:x="1.016cm" svg:y="2.54cm">
          <text:p text:style-name="P19"><text:span text:style-name="T22">Principios de Diseñ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46" draw:text-style-name="P37" draw:layer="layout" svg:width="11.173cm" svg:height="5.077cm" svg:x="1.016cm" svg:y="3.556cm">
          <text:list text:style-name="L9">
            <text:list-item>
              <text:p text:style-name="P36"><text:span text:style-name="T15">Prefijo uniforme: /api/v1/</text:span></text:p>
            </text:list-item>
            <text:list-item>
              <text:p text:style-name="P36"><text:span text:style-name="T15">Verbos HTTP estándar: GET · POST · PUT · DELETE</text:span></text:p>
            </text:list-item>
            <text:list-item>
              <text:p text:style-name="P36"><text:span text:style-name="T15">Respuestas JSON + paginación con objeto meta</text:span></text:p>
            </text:list-item>
            <text:list-item>
              <text:p text:style-name="P36"><text:span text:style-name="T15">Autenticación stateless: Bearer Token (Sanctum)</text:span></text:p>
            </text:list-item>
            <text:list-item>
              <text:p text:style-name="P36"><text:span text:style-name="T15">Sin estado en servidor entre peticiones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47" draw:text-style-name="P20" draw:layer="layout" svg:width="11.427cm" svg:height="0.911cm" svg:x="12.954cm" svg:y="2.54cm">
          <text:p text:style-name="P19"><text:span text:style-name="T22">Endpoints Destacad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87" draw:layer="layout" svg:width="11.556cm" svg:height="6.857cm" svg:x="12.827cm" svg:y="3.607cm">
          <table:table>
            <table:table-column table:style-name="co3"/>
            <table:table-column table:style-name="co4"/>
            <table:table-column table:style-name="co5"/>
            <table:table-row table:style-name="ro4" table:default-cell-style-name="ce4">
              <table:table-cell>
                <text:p text:style-name="P19"><text:span text:style-name="T33">Método</text:span></text:p>
              </table:table-cell>
              <table:table-cell>
                <text:p text:style-name="P19"><text:span text:style-name="T33">URL</text:span></text:p>
              </table:table-cell>
              <table:table-cell>
                <text:p text:style-name="P19"><text:span text:style-name="T33">Auth</text:span></text:p>
              </table:table-cell>
            </table:table-row>
            <table:table-row table:style-name="ro4" table:default-cell-style-name="ce5">
              <table:table-cell>
                <text:p text:style-name="P19"><text:span text:style-name="T34">POST</text:span></text:p>
              </table:table-cell>
              <table:table-cell>
                <text:p text:style-name="P19"><text:span text:style-name="T34">/api/v1/auth/login</text:span></text:p>
              </table:table-cell>
              <table:table-cell>
                <text:p text:style-name="P19"><text:span text:style-name="T34">No</text:span></text:p>
              </table:table-cell>
            </table:table-row>
            <table:table-row table:style-name="ro4" table:default-cell-style-name="ce5">
              <table:table-cell>
                <text:p text:style-name="P19"><text:span text:style-name="T34">GET</text:span></text:p>
              </table:table-cell>
              <table:table-cell>
                <text:p text:style-name="P19"><text:span text:style-name="T34">/api/v1/books</text:span></text:p>
              </table:table-cell>
              <table:table-cell>
                <text:p text:style-name="P19"><text:span text:style-name="T34">No</text:span></text:p>
              </table:table-cell>
            </table:table-row>
            <table:table-row table:style-name="ro4" table:default-cell-style-name="ce5">
              <table:table-cell>
                <text:p text:style-name="P19"><text:span text:style-name="T34">GET</text:span></text:p>
              </table:table-cell>
              <table:table-cell>
                <text:p text:style-name="P19"><text:span text:style-name="T34">/api/v1/books/{id}</text:span></text:p>
              </table:table-cell>
              <table:table-cell>
                <text:p text:style-name="P19"><text:span text:style-name="T34">No</text:span></text:p>
              </table:table-cell>
            </table:table-row>
            <table:table-row table:style-name="ro4" table:default-cell-style-name="ce5">
              <table:table-cell>
                <text:p text:style-name="P19"><text:span text:style-name="T34">POST</text:span></text:p>
              </table:table-cell>
              <table:table-cell>
                <text:p text:style-name="P19"><text:span text:style-name="T34">/api/v1/books</text:span></text:p>
              </table:table-cell>
              <table:table-cell>
                <text:p text:style-name="P19"><text:span text:style-name="T34">Admin</text:span></text:p>
              </table:table-cell>
            </table:table-row>
            <table:table-row table:style-name="ro4" table:default-cell-style-name="ce5">
              <table:table-cell>
                <text:p text:style-name="P19"><text:span text:style-name="T34">PUT</text:span></text:p>
              </table:table-cell>
              <table:table-cell>
                <text:p text:style-name="P19"><text:span text:style-name="T34">/api/v1/books/{id}</text:span></text:p>
              </table:table-cell>
              <table:table-cell>
                <text:p text:style-name="P19"><text:span text:style-name="T34">Admin</text:span></text:p>
              </table:table-cell>
            </table:table-row>
            <table:table-row table:style-name="ro4" table:default-cell-style-name="ce5">
              <table:table-cell>
                <text:p text:style-name="P19"><text:span text:style-name="T34">POST</text:span></text:p>
              </table:table-cell>
              <table:table-cell>
                <text:p text:style-name="P19"><text:span text:style-name="T34">/api/v1/orders</text:span></text:p>
              </table:table-cell>
              <table:table-cell>
                <text:p text:style-name="P19"><text:span text:style-name="T34">Cliente</text:span></text:p>
              </table:table-cell>
            </table:table-row>
            <table:table-row table:style-name="ro4" table:default-cell-style-name="ce5">
              <table:table-cell>
                <text:p text:style-name="P19"><text:span text:style-name="T34">GET</text:span></text:p>
              </table:table-cell>
              <table:table-cell>
                <text:p text:style-name="P19"><text:span text:style-name="T34">/api/v1/favorites</text:span></text:p>
              </table:table-cell>
              <table:table-cell>
                <text:p text:style-name="P19"><text:span text:style-name="T34">Cliente</text:span></text:p>
              </table:table-cell>
            </table:table-row>
            <table:table-row table:style-name="ro4" table:default-cell-style-name="ce5">
              <table:table-cell>
                <text:p text:style-name="P19"><text:span text:style-name="T34">POST</text:span></text:p>
              </table:table-cell>
              <table:table-cell>
                <text:p text:style-name="P19"><text:span text:style-name="T34">/api/v1/reviews</text:span></text:p>
              </table:table-cell>
              <table:table-cell>
                <text:p text:style-name="P19"><text:span text:style-name="T34">Client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PlaceHolder 1" draw:style-name="gr10" draw:layer="layout" svg:width="15.237cm" svg:height="8.57cm" svg:x="1.905cm" svg:y="3.175cm" draw:page-number="11" presentation:class="page"/>
          <draw:frame draw:name="PlaceHolder 2" presentation:style-name="pr13" draw:text-style-name="P6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4" draw:text-style-name="P8" draw:layer="layout" svg:width="8.252cm" svg:height="1.271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12" draw:style-name="dp3" draw:master-page-name="Predeterminado">
        <draw:custom-shape draw:name="Shape 0" draw:style-name="gr1" draw:text-style-name="P2" draw:layer="layout" svg:width="0.149cm" svg:height="1.394cm" svg:x="1.016cm" svg:y="0.55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48" draw:text-style-name="P20" draw:layer="layout" svg:width="23.111cm" svg:height="1.648cm" svg:x="1.397cm" svg:y="0.457cm">
          <text:p text:style-name="P19"><text:span text:style-name="T12">Funcionalidades Clave — Front Office (MPA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" draw:style-name="gr12" draw:text-style-name="P21" draw:layer="layout" svg:x1="1.016cm" svg:y1="2.159cm" svg:x2="24.384cm" svg:y2="2.16cm">
          <text:p/>
        </draw:line>
        <draw:custom-shape draw:name="Shape 3" draw:style-name="gr39" draw:text-style-name="P22" draw:layer="layout" svg:width="25.397cm" svg:height="0.696cm" svg:x="0cm" svg:y="13.58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49" draw:text-style-name="P20" draw:layer="layout" svg:width="17.777cm" svg:height="0.696cm" svg:x="0.762cm" svg:y="13.589cm">
          <text:p text:style-name="P19"><text:span text:style-name="T13">Clon de Agapea · Richard &amp; Tomás ·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50" draw:text-style-name="P4" draw:layer="layout" svg:width="1.267cm" svg:height="0.696cm" svg:x="23.876cm" svg:y="13.589cm">
          <text:p text:style-name="P3"><text:span text:style-name="T13">1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39" draw:text-style-name="P22" draw:layer="layout" svg:width="7.617cm" svg:height="0.962cm" svg:x="1.016cm" svg:y="2.54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51" draw:text-style-name="P4" draw:layer="layout" svg:width="7.617cm" svg:height="0.962cm" svg:x="1.016cm" svg:y="2.54cm">
          <text:p text:style-name="P3"><text:span text:style-name="T35">Catálogo y Búsqued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27" draw:text-style-name="P26" draw:layer="layout" svg:width="7.617cm" svg:height="7.109cm" svg:x="1.016cm" svg:y="3.505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52" draw:text-style-name="P2" draw:layer="layout" svg:width="0.251cm" svg:height="0.251cm" svg:x="1.397cm" svg:y="4.115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153" draw:text-style-name="P20" draw:layer="layout" svg:width="6.474cm" svg:height="1.648cm" svg:x="1.829cm" svg:y="3.937cm">
          <text:p text:style-name="P19"><text:span text:style-name="T36">Búsqueda con debounce 400 ms (fetch por tecla cancelado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52" draw:text-style-name="P2" draw:layer="layout" svg:width="0.251cm" svg:height="0.251cm" svg:x="1.397cm" svg:y="6.274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154" draw:text-style-name="P20" draw:layer="layout" svg:width="6.474cm" svg:height="1.648cm" svg:x="1.829cm" svg:y="6.096cm">
          <text:p text:style-name="P19"><text:span text:style-name="T36">Filtro por categoría, precio y orden alfabétic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52" draw:text-style-name="P2" draw:layer="layout" svg:width="0.251cm" svg:height="0.251cm" svg:x="1.397cm" svg:y="8.433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4" draw:style-name="gr155" draw:text-style-name="P20" draw:layer="layout" svg:width="6.474cm" svg:height="1.648cm" svg:x="1.829cm" svg:y="8.255cm">
          <text:p text:style-name="P19"><text:span text:style-name="T36">Paginación dinámica generada desde meta del backen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39" draw:text-style-name="P22" draw:layer="layout" svg:width="7.617cm" svg:height="0.962cm" svg:x="9.017cm" svg:y="2.54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56" draw:text-style-name="P4" draw:layer="layout" svg:width="7.617cm" svg:height="0.962cm" svg:x="9.017cm" svg:y="2.54cm">
          <text:p text:style-name="P3"><text:span text:style-name="T35">Carrito y Pedid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127" draw:text-style-name="P26" draw:layer="layout" svg:width="7.617cm" svg:height="7.109cm" svg:x="9.017cm" svg:y="3.505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52" draw:text-style-name="P2" draw:layer="layout" svg:width="0.251cm" svg:height="0.251cm" svg:x="9.398cm" svg:y="4.115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9" draw:style-name="gr157" draw:text-style-name="P20" draw:layer="layout" svg:width="6.474cm" svg:height="1.648cm" svg:x="9.83cm" svg:y="3.937cm">
          <text:p text:style-name="P19"><text:span text:style-name="T36">Persistencia dual: localStorage + sincronización con B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152" draw:text-style-name="P2" draw:layer="layout" svg:width="0.251cm" svg:height="0.251cm" svg:x="9.398cm" svg:y="6.274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1" draw:style-name="gr158" draw:text-style-name="P20" draw:layer="layout" svg:width="6.474cm" svg:height="1.648cm" svg:x="9.83cm" svg:y="6.096cm">
          <text:p text:style-name="P19"><text:span text:style-name="T36">Gestión completa: añadir, modificar cantidad, elimina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152" draw:text-style-name="P2" draw:layer="layout" svg:width="0.251cm" svg:height="0.251cm" svg:x="9.398cm" svg:y="8.433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3" draw:style-name="gr159" draw:text-style-name="P20" draw:layer="layout" svg:width="6.474cm" svg:height="1.648cm" svg:x="9.83cm" svg:y="8.255cm">
          <text:p text:style-name="P19"><text:span text:style-name="T36">Aplicación de cupones de descuent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39" draw:text-style-name="P22" draw:layer="layout" svg:width="7.617cm" svg:height="0.962cm" svg:x="17.018cm" svg:y="2.54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160" draw:text-style-name="P4" draw:layer="layout" svg:width="7.617cm" svg:height="0.962cm" svg:x="17.018cm" svg:y="2.54cm">
          <text:p text:style-name="P3"><text:span text:style-name="T35">Usuario y Segurida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127" draw:text-style-name="P26" draw:layer="layout" svg:width="7.617cm" svg:height="7.109cm" svg:x="17.018cm" svg:y="3.505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152" draw:text-style-name="P2" draw:layer="layout" svg:width="0.251cm" svg:height="0.251cm" svg:x="17.399cm" svg:y="4.115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8" draw:style-name="gr161" draw:text-style-name="P20" draw:layer="layout" svg:width="6.474cm" svg:height="1.648cm" svg:x="17.831cm" svg:y="3.937cm">
          <text:p text:style-name="P19"><text:span text:style-name="T36">Registro, login y cierre de sesión con token Sanctu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152" draw:text-style-name="P2" draw:layer="layout" svg:width="0.251cm" svg:height="0.251cm" svg:x="17.399cm" svg:y="6.274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0" draw:style-name="gr162" draw:text-style-name="P20" draw:layer="layout" svg:width="6.474cm" svg:height="1.648cm" svg:x="17.831cm" svg:y="6.096cm">
          <text:p text:style-name="P19"><text:span text:style-name="T36">Favoritos y reseñas de libros autenticada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152" draw:text-style-name="P2" draw:layer="layout" svg:width="0.251cm" svg:height="0.251cm" svg:x="17.399cm" svg:y="8.433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2" draw:style-name="gr163" draw:text-style-name="P20" draw:layer="layout" svg:width="6.474cm" svg:height="1.648cm" svg:x="17.831cm" svg:y="8.255cm">
          <text:p text:style-name="P19"><text:span text:style-name="T36">Formulario de contacto con validación JS + Larave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0" draw:layer="layout" svg:width="15.237cm" svg:height="8.57cm" svg:x="1.905cm" svg:y="3.175cm" draw:page-number="12" presentation:class="page"/>
          <draw:frame draw:name="PlaceHolder 2" presentation:style-name="pr14" draw:text-style-name="P6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4" draw:text-style-name="P8" draw:layer="layout" svg:width="8.252cm" svg:height="1.271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13" draw:style-name="dp3" draw:master-page-name="Predeterminado">
        <draw:custom-shape draw:name="Shape 0" draw:style-name="gr1" draw:text-style-name="P2" draw:layer="layout" svg:width="0.149cm" svg:height="1.394cm" svg:x="1.016cm" svg:y="0.55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64" draw:text-style-name="P20" draw:layer="layout" svg:width="23.111cm" svg:height="1.648cm" svg:x="1.397cm" svg:y="0.457cm">
          <text:p text:style-name="P19"><text:span text:style-name="T12">Funcionalidades Clave — Back Office (SPA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" draw:style-name="gr12" draw:text-style-name="P21" draw:layer="layout" svg:x1="1.016cm" svg:y1="2.159cm" svg:x2="24.384cm" svg:y2="2.16cm">
          <text:p/>
        </draw:line>
        <draw:custom-shape draw:name="Shape 3" draw:style-name="gr39" draw:text-style-name="P22" draw:layer="layout" svg:width="25.397cm" svg:height="0.696cm" svg:x="0cm" svg:y="13.58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65" draw:text-style-name="P20" draw:layer="layout" svg:width="17.777cm" svg:height="0.696cm" svg:x="0.762cm" svg:y="13.589cm">
          <text:p text:style-name="P19"><text:span text:style-name="T13">Clon de Agapea · Richard &amp; Tomás ·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66" draw:text-style-name="P4" draw:layer="layout" svg:width="1.267cm" svg:height="0.696cm" svg:x="23.876cm" svg:y="13.589cm">
          <text:p text:style-name="P3"><text:span text:style-name="T13">1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67" draw:text-style-name="P20" draw:layer="layout" svg:width="13.205cm" svg:height="0.962cm" svg:x="1.016cm" svg:y="2.54cm">
          <text:p text:style-name="P19"><text:span text:style-name="T22">Panel de Administració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68" draw:text-style-name="P37" draw:layer="layout" svg:width="13.205cm" svg:height="5.077cm" svg:x="1.016cm" svg:y="3.683cm">
          <text:list text:style-name="L9">
            <text:list-item>
              <text:p text:style-name="P36"><text:span text:style-name="T15">CRUD completo: libros, categorías, autores, editoriales, etiquetas</text:span></text:p>
            </text:list-item>
            <text:list-item>
              <text:p text:style-name="P36"><text:span text:style-name="T15">Gestión de clientes, pedidos y cupones de descuento</text:span></text:p>
            </text:list-item>
            <text:list-item>
              <text:p text:style-name="P36"><text:span text:style-name="T15">Visualización de reseñas y mensajes de contacto</text:span></text:p>
            </text:list-item>
            <text:list-item>
              <text:p text:style-name="P36"><text:span text:style-name="T15">Dashboard con estadísticas: libros totales, pedidos del mes, ingresos</text:span></text:p>
            </text:list-item>
            <text:list-item>
              <text:p text:style-name="P36"><text:span text:style-name="T15">Gráfica interactiva Pedidos vs Ingresos (Chart.js)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69" draw:text-style-name="P20" draw:layer="layout" svg:width="13.205cm" svg:height="0.962cm" svg:x="1.016cm" svg:y="9.017cm">
          <text:p text:style-name="P19"><text:span text:style-name="T22">Enrutamiento SPA Propi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70" draw:text-style-name="P37" draw:layer="layout" svg:width="13.205cm" svg:height="2.283cm" svg:x="1.016cm" svg:y="10.084cm">
          <text:list text:style-name="L9">
            <text:list-item>
              <text:p text:style-name="P36"><text:span text:style-name="T15">Router.js propio sin librerías externas</text:span></text:p>
            </text:list-item>
            <text:list-item>
              <text:p text:style-name="P36"><text:span text:style-name="T15">Un único index.html — componentes cargados dinámicamente sin recarga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11" draw:text-style-name="P35" draw:layer="layout" svg:width="9.776cm" svg:height="7.363cm" svg:x="14.732cm" svg:y="2.54cm">
          <draw:image xlink:href="Pictures/10000000000004F900000279A90F9BF4.jpg" xlink:type="simple" xlink:show="embed" xlink:actuate="onLoad" draw:mime-type="image/jpeg">
            <text:p/>
          </draw:image>
          <svg:desc>preencoded.png</svg:desc>
        </draw:frame>
        <presentation:notes draw:style-name="dp2">
          <draw:page-thumbnail draw:name="PlaceHolder 1" draw:style-name="gr10" draw:layer="layout" svg:width="15.237cm" svg:height="8.57cm" svg:x="1.905cm" svg:y="3.175cm" draw:page-number="13" presentation:class="page"/>
          <draw:frame draw:name="PlaceHolder 2" presentation:style-name="pr15" draw:text-style-name="P6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4" draw:text-style-name="P8" draw:layer="layout" svg:width="8.252cm" svg:height="1.271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14" draw:style-name="dp3" draw:master-page-name="Predeterminado">
        <draw:custom-shape draw:name="Shape 0" draw:style-name="gr1" draw:text-style-name="P2" draw:layer="layout" svg:width="0.149cm" svg:height="1.394cm" svg:x="1.016cm" svg:y="0.55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71" draw:text-style-name="P20" draw:layer="layout" svg:width="23.111cm" svg:height="1.648cm" svg:x="1.397cm" svg:y="0.457cm">
          <text:p text:style-name="P19"><text:span text:style-name="T12">Frontend — Técnicas Clav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" draw:style-name="gr12" draw:text-style-name="P21" draw:layer="layout" svg:x1="1.016cm" svg:y1="2.159cm" svg:x2="24.384cm" svg:y2="2.16cm">
          <text:p/>
        </draw:line>
        <draw:custom-shape draw:name="Shape 3" draw:style-name="gr39" draw:text-style-name="P22" draw:layer="layout" svg:width="25.397cm" svg:height="0.696cm" svg:x="0cm" svg:y="13.58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72" draw:text-style-name="P20" draw:layer="layout" svg:width="17.777cm" svg:height="0.696cm" svg:x="0.762cm" svg:y="13.589cm">
          <text:p text:style-name="P19"><text:span text:style-name="T13">Clon de Agapea · Richard &amp; Tomás ·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73" draw:text-style-name="P4" draw:layer="layout" svg:width="1.267cm" svg:height="0.696cm" svg:x="23.876cm" svg:y="13.589cm">
          <text:p text:style-name="P3"><text:span text:style-name="T13">1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27" draw:text-style-name="P26" draw:layer="layout" svg:width="7.617cm" svg:height="4.315cm" svg:x="1.016cm" svg:y="2.54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74" draw:text-style-name="P2" draw:layer="layout" svg:width="7.617cm" svg:height="0.149cm" svg:x="1.016cm" svg:y="2.54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75" draw:text-style-name="P20" draw:layer="layout" svg:width="6.855cm" svg:height="1.064cm" svg:x="1.397cm" svg:y="2.794cm">
          <text:p text:style-name="P19"><text:span text:style-name="T37">Módulos ES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76" draw:text-style-name="P20" draw:layer="layout" svg:width="6.855cm" svg:height="2.537cm" svg:x="1.397cm" svg:y="3.937cm">
          <text:p text:style-name="P19"><text:span text:style-name="T38">import / export — código organizado por responsabilidad sin bundl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27" draw:text-style-name="P26" draw:layer="layout" svg:width="7.617cm" svg:height="4.315cm" svg:x="9.017cm" svg:y="2.54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74" draw:text-style-name="P2" draw:layer="layout" svg:width="7.617cm" svg:height="0.149cm" svg:x="9.017cm" svg:y="2.54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77" draw:text-style-name="P20" draw:layer="layout" svg:width="6.855cm" svg:height="1.064cm" svg:x="9.398cm" svg:y="2.794cm">
          <text:p text:style-name="P19"><text:span text:style-name="T37">fetch + async/awai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78" draw:text-style-name="P20" draw:layer="layout" svg:width="6.855cm" svg:height="2.537cm" svg:x="9.398cm" svg:y="3.937cm">
          <text:p text:style-name="P19"><text:span text:style-name="T38">apiFetch() centraliza todas las llamadas con manejo de token y errores 40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27" draw:text-style-name="P26" draw:layer="layout" svg:width="7.617cm" svg:height="4.315cm" svg:x="17.018cm" svg:y="2.54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74" draw:text-style-name="P2" draw:layer="layout" svg:width="7.617cm" svg:height="0.149cm" svg:x="17.018cm" svg:y="2.54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79" draw:text-style-name="P20" draw:layer="layout" svg:width="6.855cm" svg:height="1.064cm" svg:x="17.399cm" svg:y="2.794cm">
          <text:p text:style-name="P19"><text:span text:style-name="T37">Debounce 400 m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80" draw:text-style-name="P20" draw:layer="layout" svg:width="6.855cm" svg:height="2.537cm" svg:x="17.399cm" svg:y="3.937cm">
          <text:p text:style-name="P19"><text:span text:style-name="T38">clearTimeout + setTimeout evita saturar la API al escribir en el buscado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27" draw:text-style-name="P26" draw:layer="layout" svg:width="7.617cm" svg:height="4.315cm" svg:x="1.016cm" svg:y="7.239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74" draw:text-style-name="P2" draw:layer="layout" svg:width="7.617cm" svg:height="0.149cm" svg:x="1.016cm" svg:y="7.23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81" draw:text-style-name="P20" draw:layer="layout" svg:width="6.855cm" svg:height="1.064cm" svg:x="1.397cm" svg:y="7.493cm">
          <text:p text:style-name="P19"><text:span text:style-name="T37">localStorag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82" draw:text-style-name="P20" draw:layer="layout" svg:width="6.855cm" svg:height="2.537cm" svg:x="1.397cm" svg:y="8.636cm">
          <text:p text:style-name="P19"><text:span text:style-name="T38">Carrito, favoritos, token y datos de sesión persisten en el navegado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127" draw:text-style-name="P26" draw:layer="layout" svg:width="7.617cm" svg:height="4.315cm" svg:x="9.017cm" svg:y="7.239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174" draw:text-style-name="P2" draw:layer="layout" svg:width="7.617cm" svg:height="0.149cm" svg:x="9.017cm" svg:y="7.23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83" draw:text-style-name="P20" draw:layer="layout" svg:width="6.855cm" svg:height="1.064cm" svg:x="9.398cm" svg:y="7.493cm">
          <text:p text:style-name="P19"><text:span text:style-name="T37">Carrito Híbrid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184" draw:text-style-name="P20" draw:layer="layout" svg:width="6.855cm" svg:height="2.537cm" svg:x="9.398cm" svg:y="8.636cm">
          <text:p text:style-name="P19"><text:span text:style-name="T38">Estado local en localStorage + sincronización con BD al hacer logi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127" draw:text-style-name="P26" draw:layer="layout" svg:width="7.617cm" svg:height="4.315cm" svg:x="17.018cm" svg:y="7.239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174" draw:text-style-name="P2" draw:layer="layout" svg:width="7.617cm" svg:height="0.149cm" svg:x="17.018cm" svg:y="7.23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185" draw:text-style-name="P20" draw:layer="layout" svg:width="6.855cm" svg:height="1.064cm" svg:x="17.399cm" svg:y="7.493cm">
          <text:p text:style-name="P19"><text:span text:style-name="T37">Validación J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186" draw:text-style-name="P20" draw:layer="layout" svg:width="6.855cm" svg:height="2.537cm" svg:x="17.399cm" svg:y="8.636cm">
          <text:p text:style-name="P19"><text:span text:style-name="T38">Formularios validados en cliente antes de enviar al backend Larave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0" draw:layer="layout" svg:width="15.237cm" svg:height="8.57cm" svg:x="1.905cm" svg:y="3.175cm" draw:page-number="14" presentation:class="page"/>
          <draw:frame draw:name="PlaceHolder 2" presentation:style-name="pr16" draw:text-style-name="P6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4" draw:text-style-name="P8" draw:layer="layout" svg:width="8.252cm" svg:height="1.271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15" draw:style-name="dp3" draw:master-page-name="Predeterminado">
        <draw:custom-shape draw:name="Shape 0" draw:style-name="gr1" draw:text-style-name="P2" draw:layer="layout" svg:width="0.149cm" svg:height="1.394cm" svg:x="1.016cm" svg:y="0.55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87" draw:text-style-name="P20" draw:layer="layout" svg:width="23.111cm" svg:height="1.648cm" svg:x="1.397cm" svg:y="0.457cm">
          <text:p text:style-name="P19"><text:span text:style-name="T12">Seguridad y Autenticació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" draw:style-name="gr12" draw:text-style-name="P21" draw:layer="layout" svg:x1="1.016cm" svg:y1="2.159cm" svg:x2="24.384cm" svg:y2="2.16cm">
          <text:p/>
        </draw:line>
        <draw:custom-shape draw:name="Shape 3" draw:style-name="gr39" draw:text-style-name="P22" draw:layer="layout" svg:width="25.397cm" svg:height="0.696cm" svg:x="0cm" svg:y="13.58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88" draw:text-style-name="P20" draw:layer="layout" svg:width="17.777cm" svg:height="0.696cm" svg:x="0.762cm" svg:y="13.589cm">
          <text:p text:style-name="P19"><text:span text:style-name="T13">Clon de Agapea · Richard &amp; Tomás ·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89" draw:text-style-name="P4" draw:layer="layout" svg:width="1.267cm" svg:height="0.696cm" svg:x="23.876cm" svg:y="13.589cm">
          <text:p text:style-name="P3"><text:span text:style-name="T13">1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90" draw:text-style-name="P20" draw:layer="layout" svg:width="23.365cm" svg:height="0.911cm" svg:x="1.016cm" svg:y="2.54cm">
          <text:p text:style-name="P19"><text:span text:style-name="T22">Flujo de Autenticación con Laravel Sanctu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91" draw:text-style-name="P26" draw:layer="layout" svg:width="5.585cm" svg:height="2.283cm" svg:x="1.016cm" svg:y="3.81cm">
          <text:p text:style-name="P1"><text:span text:style-name="T16"/></text:p>
          <draw:enhanced-geometry draw:mirror-horizontal="false" draw:mirror-vertical="false" draw:glue-points="?f8 0 0 ?f9 ?f8 ?f10 ?f11 ?f9" draw:text-areas="?f5 ?f5 ?f6 ?f7" svg:viewBox="0 0 0 0" draw:type="ooxml-roundRect" draw:modifiers="77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8" draw:style-name="gr192" draw:text-style-name="P4" draw:layer="layout" svg:width="5.204cm" svg:height="2.283cm" svg:x="1.219cm" svg:y="3.81cm">
          <text:p text:style-name="P3"><text:span text:style-name="T39">1 <text:s/>Cliente envía email + passwor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91" draw:text-style-name="P26" draw:layer="layout" svg:width="5.585cm" svg:height="2.283cm" svg:x="6.985cm" svg:y="3.81cm">
          <text:p text:style-name="P1"><text:span text:style-name="T16"/></text:p>
          <draw:enhanced-geometry draw:mirror-horizontal="false" draw:mirror-vertical="false" draw:glue-points="?f8 0 0 ?f9 ?f8 ?f10 ?f11 ?f9" draw:text-areas="?f5 ?f5 ?f6 ?f7" svg:viewBox="0 0 0 0" draw:type="ooxml-roundRect" draw:modifiers="77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10" draw:style-name="gr193" draw:text-style-name="P4" draw:layer="layout" svg:width="5.204cm" svg:height="2.283cm" svg:x="7.188cm" svg:y="3.81cm">
          <text:p text:style-name="P3"><text:span text:style-name="T39">2 <text:s/>Backend valida credencial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91" draw:text-style-name="P26" draw:layer="layout" svg:width="5.585cm" svg:height="2.283cm" svg:x="12.954cm" svg:y="3.81cm">
          <text:p text:style-name="P1"><text:span text:style-name="T16"/></text:p>
          <draw:enhanced-geometry draw:mirror-horizontal="false" draw:mirror-vertical="false" draw:glue-points="?f8 0 0 ?f9 ?f8 ?f10 ?f11 ?f9" draw:text-areas="?f5 ?f5 ?f6 ?f7" svg:viewBox="0 0 0 0" draw:type="ooxml-roundRect" draw:modifiers="77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12" draw:style-name="gr194" draw:text-style-name="P4" draw:layer="layout" svg:width="5.204cm" svg:height="2.283cm" svg:x="13.157cm" svg:y="3.81cm">
          <text:p text:style-name="P3"><text:span text:style-name="T39">3 <text:s/>Genera token de acceso persona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91" draw:text-style-name="P26" draw:layer="layout" svg:width="5.585cm" svg:height="2.283cm" svg:x="18.923cm" svg:y="3.81cm">
          <text:p text:style-name="P1"><text:span text:style-name="T16"/></text:p>
          <draw:enhanced-geometry draw:mirror-horizontal="false" draw:mirror-vertical="false" draw:glue-points="?f8 0 0 ?f9 ?f8 ?f10 ?f11 ?f9" draw:text-areas="?f5 ?f5 ?f6 ?f7" svg:viewBox="0 0 0 0" draw:type="ooxml-roundRect" draw:modifiers="77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14" draw:style-name="gr195" draw:text-style-name="P4" draw:layer="layout" svg:width="5.204cm" svg:height="2.283cm" svg:x="19.126cm" svg:y="3.81cm">
          <text:p text:style-name="P3"><text:span text:style-name="T39">4 <text:s/>Devuelve token en respuesta JS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91" draw:text-style-name="P26" draw:layer="layout" svg:width="5.585cm" svg:height="2.283cm" svg:x="1cm" svg:y="7.215cm">
          <text:p text:style-name="P1"><text:span text:style-name="T16"/></text:p>
          <draw:enhanced-geometry draw:mirror-horizontal="false" draw:mirror-vertical="false" draw:glue-points="?f8 0 0 ?f9 ?f8 ?f10 ?f11 ?f9" draw:text-areas="?f5 ?f5 ?f6 ?f7" svg:viewBox="0 0 0 0" draw:type="ooxml-roundRect" draw:modifiers="77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16" draw:style-name="gr196" draw:text-style-name="P4" draw:layer="layout" svg:width="5.204cm" svg:height="2.283cm" svg:x="1.219cm" svg:y="7.215cm">
          <text:p text:style-name="P3"><text:span text:style-name="T39">5 <text:s/>Frontend guarda token en localStorag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191" draw:text-style-name="P26" draw:layer="layout" svg:width="5.585cm" svg:height="2.283cm" svg:x="6.985cm" svg:y="7.215cm">
          <text:p text:style-name="P1"><text:span text:style-name="T16"/></text:p>
          <draw:enhanced-geometry draw:mirror-horizontal="false" draw:mirror-vertical="false" draw:glue-points="?f8 0 0 ?f9 ?f8 ?f10 ?f11 ?f9" draw:text-areas="?f5 ?f5 ?f6 ?f7" svg:viewBox="0 0 0 0" draw:type="ooxml-roundRect" draw:modifiers="77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18" draw:style-name="gr197" draw:text-style-name="P4" draw:layer="layout" svg:width="5.204cm" svg:height="2.283cm" svg:x="7.17cm" svg:y="7.215cm">
          <text:p text:style-name="P3"><text:span text:style-name="T39">6 <text:s/>Cada petición adjunta: Authorization: Bearer &lt;token&gt;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39" draw:text-style-name="P22" draw:layer="layout" svg:width="5.585cm" svg:height="2.283cm" svg:x="12.913cm" svg:y="7.215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77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20" draw:style-name="gr198" draw:text-style-name="P4" draw:layer="layout" svg:width="5.204cm" svg:height="2.283cm" svg:x="13.157cm" svg:y="7.215cm">
          <text:p text:style-name="P3"><text:span text:style-name="T40">7 <text:s/>Middleware auth:sanctum valida en cada reques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99" draw:text-style-name="P20" draw:layer="layout" svg:width="23.365cm" svg:height="0.759cm" svg:x="1cm" svg:y="10cm">
          <text:p text:style-name="P19"><text:span text:style-name="T17">Roles de Acces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87" draw:layer="layout" svg:width="23.367cm" svg:height="2.201cm" svg:x="0.855cm" svg:y="10.823cm">
          <table:table>
            <table:table-column table:style-name="co6"/>
            <table:table-column table:style-name="co7"/>
            <table:table-column table:style-name="co8"/>
            <table:table-column table:style-name="co9"/>
            <table:table-row table:style-name="ro5" table:default-cell-style-name="ce4">
              <table:table-cell>
                <text:p text:style-name="P19"><text:span text:style-name="T41">Sistema</text:span></text:p>
              </table:table-cell>
              <table:table-cell>
                <text:p text:style-name="P19"><text:span text:style-name="T41">Endpoint Login</text:span></text:p>
              </table:table-cell>
              <table:table-cell>
                <text:p text:style-name="P19"><text:span text:style-name="T41">Modelo</text:span></text:p>
              </table:table-cell>
              <table:table-cell>
                <text:p text:style-name="P19"><text:span text:style-name="T41">Rutas protegidas</text:span></text:p>
              </table:table-cell>
            </table:table-row>
            <table:table-row table:style-name="ro5" table:default-cell-style-name="ce5">
              <table:table-cell>
                <text:p text:style-name="P19"><text:span text:style-name="T24">Clientes</text:span></text:p>
              </table:table-cell>
              <table:table-cell>
                <text:p text:style-name="P19"><text:span text:style-name="T24">POST /api/v1/auth/login</text:span></text:p>
              </table:table-cell>
              <table:table-cell>
                <text:p text:style-name="P19"><text:span text:style-name="T24">Modelo Customer</text:span></text:p>
              </table:table-cell>
              <table:table-cell>
                <text:p text:style-name="P19"><text:span text:style-name="T24">Carrito · pedidos · favoritos · reseñas</text:span></text:p>
              </table:table-cell>
            </table:table-row>
            <table:table-row table:style-name="ro5" table:default-cell-style-name="ce5">
              <table:table-cell>
                <text:p text:style-name="P19"><text:span text:style-name="T24">Administradores</text:span></text:p>
              </table:table-cell>
              <table:table-cell>
                <text:p text:style-name="P19"><text:span text:style-name="T24">POST /api/v1/admin/login</text:span></text:p>
              </table:table-cell>
              <table:table-cell>
                <text:p text:style-name="P19"><text:span text:style-name="T24">Modelo User</text:span></text:p>
              </table:table-cell>
              <table:table-cell>
                <text:p text:style-name="P19"><text:span text:style-name="T24">CRUD completo del back office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PlaceHolder 1" draw:style-name="gr10" draw:layer="layout" svg:width="15.237cm" svg:height="8.57cm" svg:x="1.905cm" svg:y="3.175cm" draw:page-number="15" presentation:class="page"/>
          <draw:frame draw:name="PlaceHolder 2" presentation:style-name="pr17" draw:text-style-name="P6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4" draw:text-style-name="P8" draw:layer="layout" svg:width="8.252cm" svg:height="1.271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16" draw:style-name="dp3" draw:master-page-name="Predeterminado">
        <draw:custom-shape draw:name="Shape 0" draw:style-name="gr1" draw:text-style-name="P2" draw:layer="layout" svg:width="0.149cm" svg:height="1.394cm" svg:x="1.016cm" svg:y="0.55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00" draw:text-style-name="P20" draw:layer="layout" svg:width="23.111cm" svg:height="1.648cm" svg:x="1.397cm" svg:y="0.457cm">
          <text:p text:style-name="P19"><text:span text:style-name="T12">Uso de Inteligencia Artificial en el Desarroll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" draw:style-name="gr12" draw:text-style-name="P21" draw:layer="layout" svg:x1="1.016cm" svg:y1="2.159cm" svg:x2="24.384cm" svg:y2="2.16cm">
          <text:p/>
        </draw:line>
        <draw:custom-shape draw:name="Shape 3" draw:style-name="gr39" draw:text-style-name="P22" draw:layer="layout" svg:width="25.397cm" svg:height="0.696cm" svg:x="0cm" svg:y="13.58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01" draw:text-style-name="P20" draw:layer="layout" svg:width="17.777cm" svg:height="0.696cm" svg:x="0.762cm" svg:y="13.589cm">
          <text:p text:style-name="P19"><text:span text:style-name="T13">Clon de Agapea · Richard &amp; Tomás ·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02" draw:text-style-name="P4" draw:layer="layout" svg:width="1.267cm" svg:height="0.696cm" svg:x="23.876cm" svg:y="13.589cm">
          <text:p text:style-name="P3"><text:span text:style-name="T13">1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39" draw:text-style-name="P22" draw:layer="layout" svg:width="7.617cm" svg:height="1.267cm" svg:x="1.016cm" svg:y="2.54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03" draw:text-style-name="P4" draw:layer="layout" svg:width="7.617cm" svg:height="0.708cm" svg:x="1.016cm" svg:y="2.54cm">
          <text:p text:style-name="P3"><text:span text:style-name="T42">Antigravity + Google Gemin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04" draw:text-style-name="P4" draw:layer="layout" svg:width="7.617cm" svg:height="0.556cm" svg:x="1.016cm" svg:y="3cm">
          <text:p text:style-name="P3"><text:span text:style-name="T43">Backend scaffoldi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27" draw:text-style-name="P26" draw:layer="layout" svg:width="7.617cm" svg:height="6.601cm" svg:x="1.016cm" svg:y="3.81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205" draw:text-style-name="P2" draw:layer="layout" svg:width="0.276cm" svg:height="0.276cm" svg:x="1.473cm" svg:y="4.445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1" draw:style-name="gr206" draw:text-style-name="P20" draw:layer="layout" svg:width="6.347cm" svg:height="1.648cm" svg:x="1.956cm" svg:y="4.242cm">
          <text:p text:style-name="P19"><text:span text:style-name="T36">Generación de modelos y migraciones Larave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205" draw:text-style-name="P2" draw:layer="layout" svg:width="0.276cm" svg:height="0.276cm" svg:x="1.473cm" svg:y="6.426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3" draw:style-name="gr207" draw:text-style-name="P20" draw:layer="layout" svg:width="6.347cm" svg:height="1.648cm" svg:x="1.956cm" svg:y="6.223cm">
          <text:p text:style-name="P19"><text:span text:style-name="T36">Scaffolding de controladores y rutas AP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205" draw:text-style-name="P2" draw:layer="layout" svg:width="0.276cm" svg:height="0.276cm" svg:x="1.473cm" svg:y="8.407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5" draw:style-name="gr208" draw:text-style-name="P20" draw:layer="layout" svg:width="6.347cm" svg:height="1.648cm" svg:x="1.956cm" svg:y="8.204cm">
          <text:p text:style-name="P19"><text:span text:style-name="T36">Principal herramienta de desarrollo asistido del backen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39" draw:text-style-name="P22" draw:layer="layout" svg:width="7.617cm" svg:height="1.267cm" svg:x="9.017cm" svg:y="2.54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209" draw:text-style-name="P4" draw:layer="layout" svg:width="7.617cm" svg:height="0.708cm" svg:x="9.017cm" svg:y="2.54cm">
          <text:p text:style-name="P3"><text:span text:style-name="T42">Claude (Anthropic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210" draw:text-style-name="P4" draw:layer="layout" svg:width="7.617cm" svg:height="0.556cm" svg:x="9.017cm" svg:y="3cm">
          <text:p text:style-name="P3"><text:span text:style-name="T43">Frontend + consultas J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27" draw:text-style-name="P26" draw:layer="layout" svg:width="7.617cm" svg:height="6.601cm" svg:x="9.017cm" svg:y="3.809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205" draw:text-style-name="P2" draw:layer="layout" svg:width="0.276cm" svg:height="0.276cm" svg:x="9.474cm" svg:y="4.445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1" draw:style-name="gr211" draw:text-style-name="P20" draw:layer="layout" svg:width="6.347cm" svg:height="1.648cm" svg:x="9.957cm" svg:y="4.242cm">
          <text:p text:style-name="P19"><text:span text:style-name="T36">Maquetación CSS del front offic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205" draw:text-style-name="P2" draw:layer="layout" svg:width="0.276cm" svg:height="0.276cm" svg:x="9.474cm" svg:y="6.426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3" draw:style-name="gr212" draw:text-style-name="P20" draw:layer="layout" svg:width="6.347cm" svg:height="1.648cm" svg:x="9.957cm" svg:y="6.223cm">
          <text:p text:style-name="P19"><text:span text:style-name="T36">Consultas y herramienta para puesta en producció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205" draw:text-style-name="P2" draw:layer="layout" svg:width="0.276cm" svg:height="0.276cm" svg:x="9.474cm" svg:y="8.407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5" draw:style-name="gr213" draw:text-style-name="P20" draw:layer="layout" svg:width="6.347cm" svg:height="1.648cm" svg:x="9.957cm" svg:y="8.204cm">
          <text:p text:style-name="P19"><text:span text:style-name="T36">Resolución de dudas técnica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39" draw:text-style-name="P22" draw:layer="layout" svg:width="7.617cm" svg:height="1.267cm" svg:x="17.018cm" svg:y="2.54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214" draw:text-style-name="P4" draw:layer="layout" svg:width="7.617cm" svg:height="0.708cm" svg:x="17.018cm" svg:y="2.54cm">
          <text:p text:style-name="P3"><text:span text:style-name="T42">ChatGPT (OpenAI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215" draw:text-style-name="P4" draw:layer="layout" svg:width="7.617cm" svg:height="0.556cm" svg:x="17.018cm" svg:y="3cm">
          <text:p text:style-name="P3"><text:span text:style-name="T43">Soporte puntua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127" draw:text-style-name="P26" draw:layer="layout" svg:width="7.617cm" svg:height="6.601cm" svg:x="17.018cm" svg:y="3.81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205" draw:text-style-name="P2" draw:layer="layout" svg:width="0.276cm" svg:height="0.276cm" svg:x="17.475cm" svg:y="4.445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1" draw:style-name="gr216" draw:text-style-name="P20" draw:layer="layout" svg:width="6.347cm" svg:height="1.648cm" svg:x="17.958cm" svg:y="4.242cm">
          <text:p text:style-name="P19"><text:span text:style-name="T36">Depuración de error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205" draw:text-style-name="P2" draw:layer="layout" svg:width="0.276cm" svg:height="0.276cm" svg:x="17.475cm" svg:y="6.426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3" draw:style-name="gr217" draw:text-style-name="P20" draw:layer="layout" svg:width="6.347cm" svg:height="1.648cm" svg:x="17.958cm" svg:y="6.223cm">
          <text:p text:style-name="P19"><text:span text:style-name="T36">Cuestiones de lógica específica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" draw:style-name="gr205" draw:text-style-name="P2" draw:layer="layout" svg:width="0.276cm" svg:height="0.276cm" svg:x="17.475cm" svg:y="8.407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5" draw:style-name="gr218" draw:text-style-name="P20" draw:layer="layout" svg:width="6.347cm" svg:height="1.648cm" svg:x="17.958cm" svg:y="8.204cm">
          <text:p text:style-name="P19"><text:span text:style-name="T36">Consultas ocasionales durante la integració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0" draw:layer="layout" svg:width="15.237cm" svg:height="8.57cm" svg:x="1.905cm" svg:y="3.175cm" draw:page-number="16" presentation:class="page"/>
          <draw:frame draw:name="PlaceHolder 2" presentation:style-name="pr18" draw:text-style-name="P6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4" draw:text-style-name="P8" draw:layer="layout" svg:width="8.252cm" svg:height="1.271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17" draw:style-name="dp3" draw:master-page-name="Predeterminado">
        <draw:custom-shape draw:name="GoldBar" draw:style-name="gr1" draw:text-style-name="P30" draw:layer="layout" svg:width="0.149cm" svg:height="1.394cm" svg:x="1.016cm" svg:y="0.559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" draw:style-name="gr219" draw:text-style-name="P11" draw:layer="layout" svg:width="23.111cm" svg:height="1.648cm" svg:x="1.397cm" svg:y="0.457cm">
          <text:p text:style-name="P10"><text:span text:style-name="T8">Problemas Encontrados y Solucion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Divider" draw:style-name="gr12" draw:text-style-name="P21" draw:layer="layout" svg:x1="1.016cm" svg:y1="2.159cm" svg:x2="24.384cm" svg:y2="2.16cm">
          <text:p/>
        </draw:line>
        <draw:custom-shape draw:name="ProbCard" draw:style-name="gr220" draw:text-style-name="P38" draw:layer="layout" svg:width="11.427cm" svg:height="3.3cm" svg:x="1.016cm" svg:y="2.795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dBar" draw:style-name="gr221" draw:text-style-name="P39" draw:layer="layout" svg:width="11.427cm" svg:height="0.138cm" svg:x="1.016cm" svg:y="2.795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robText" draw:style-name="gr222" draw:text-style-name="P17" draw:layer="layout" svg:width="10.919cm" svg:height="3.133cm" svg:x="1.27cm" svg:y="2.962cm">
          <text:p text:style-name="P1"><text:span text:style-name="T44">Problema</text:span></text:p>
          <text:p text:style-name="P1"><text:span text:style-name="T19">Curva de aprendizaje JS avanzado</text:span></text:p>
          <text:p text:style-name="P1"><text:span text:style-name="T45"/></text:p>
          <text:p text:style-name="P1"><text:span text:style-name="T46">Solución</text:span></text:p>
          <text:p text:style-name="P1"><text:span text:style-name="T47">Módulos ES6, fetch y debounce implementados antes de que se impartieran en clas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robCard" draw:style-name="gr220" draw:text-style-name="P38" draw:layer="layout" svg:width="11.427cm" svg:height="3.3cm" svg:x="13.08cm" svg:y="2.795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dBar" draw:style-name="gr221" draw:text-style-name="P39" draw:layer="layout" svg:width="11.427cm" svg:height="0.138cm" svg:x="13.08cm" svg:y="2.795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robText" draw:style-name="gr223" draw:text-style-name="P17" draw:layer="layout" svg:width="10.919cm" svg:height="3.133cm" svg:x="13.334cm" svg:y="2.962cm">
          <text:p text:style-name="P1"><text:span text:style-name="T44">Problema</text:span></text:p>
          <text:p text:style-name="P1"><text:span text:style-name="T19">Desbordamiento de trabajo CSS</text:span></text:p>
          <text:p text:style-name="P1"><text:span text:style-name="T45"/></text:p>
          <text:p text:style-name="P1"><text:span text:style-name="T46">Solución</text:span></text:p>
          <text:p text:style-name="P1"><text:span text:style-name="T47">Estrategia mixta: CSS manual + asistencia de Claude con instrucciones precisa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robCard" draw:style-name="gr220" draw:text-style-name="P38" draw:layer="layout" svg:width="11.427cm" svg:height="3.3cm" svg:x="1.016cm" svg:y="6.348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dBar" draw:style-name="gr221" draw:text-style-name="P39" draw:layer="layout" svg:width="11.427cm" svg:height="0.138cm" svg:x="1.016cm" svg:y="6.348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robText" draw:style-name="gr224" draw:text-style-name="P17" draw:layer="layout" svg:width="10.919cm" svg:height="3.133cm" svg:x="1.27cm" svg:y="6.515cm">
          <text:p text:style-name="P1"><text:span text:style-name="T44">Problema</text:span></text:p>
          <text:p text:style-name="P1"><text:span text:style-name="T19">Portadas de libros no cargaban tras conectar el backend</text:span></text:p>
          <text:p text:style-name="P1"><text:span text:style-name="T45"/></text:p>
          <text:p text:style-name="P1"><text:span text:style-name="T46">Solución</text:span></text:p>
          <text:p text:style-name="P1"><text:span text:style-name="T47">Rutas relativas en BD; el frontend resuelve la URL completa al renderiza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robCard" draw:style-name="gr220" draw:text-style-name="P38" draw:layer="layout" svg:width="11.427cm" svg:height="3.3cm" svg:x="13.08cm" svg:y="6.348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dBar" draw:style-name="gr221" draw:text-style-name="P39" draw:layer="layout" svg:width="11.427cm" svg:height="0.138cm" svg:x="13.08cm" svg:y="6.348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robText" draw:style-name="gr225" draw:text-style-name="P17" draw:layer="layout" svg:width="10.919cm" svg:height="3.133cm" svg:x="13.334cm" svg:y="6.515cm">
          <text:p text:style-name="P1"><text:span text:style-name="T44">Problema</text:span></text:p>
          <text:p text:style-name="P1"><text:span text:style-name="T19">Cambios no deseados introducidos por la IA en la DB</text:span></text:p>
          <text:p text:style-name="P1"><text:span text:style-name="T45"/></text:p>
          <text:p text:style-name="P1"><text:span text:style-name="T46">Solución</text:span></text:p>
          <text:p text:style-name="P1"><text:span text:style-name="T47">Se restauraron manualmente los datos correctos. El incidente reforzó la necesidad de revisar los cambios que la IA realizab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robCard" draw:style-name="gr220" draw:text-style-name="P38" draw:layer="layout" svg:width="11.427cm" svg:height="3.3cm" svg:x="1.016cm" svg:y="9.901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dBar" draw:style-name="gr221" draw:text-style-name="P39" draw:layer="layout" svg:width="11.427cm" svg:height="0.138cm" svg:x="1.016cm" svg:y="9.901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robText" draw:style-name="gr226" draw:text-style-name="P17" draw:layer="layout" svg:width="10.919cm" svg:height="3.133cm" svg:x="1.27cm" svg:y="10.068cm">
          <text:p text:style-name="P1"><text:span text:style-name="T44">Problema</text:span></text:p>
          <text:p text:style-name="P1"><text:span text:style-name="T19">Incompatibilidad entre MySQL y PostgreSQL en producción</text:span></text:p>
          <text:p text:style-name="P1"><text:span text:style-name="T45"/></text:p>
          <text:p text:style-name="P1"><text:span text:style-name="T46">Solución</text:span></text:p>
          <text:p text:style-name="P1"><text:span text:style-name="T47">Se utilizó el seeder de Laravel para generar un conjunto de datos de prueba directamente sobre PostgreSQL (solución temporal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robCard" draw:style-name="gr220" draw:text-style-name="P38" draw:layer="layout" svg:width="11.427cm" svg:height="3.3cm" svg:x="13.08cm" svg:y="9.901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dBar" draw:style-name="gr221" draw:text-style-name="P39" draw:layer="layout" svg:width="11.427cm" svg:height="0.138cm" svg:x="13.08cm" svg:y="9.901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robText" draw:style-name="gr227" draw:text-style-name="P17" draw:layer="layout" svg:width="10.919cm" svg:height="3.133cm" svg:x="13.334cm" svg:y="10.068cm">
          <text:p text:style-name="P1"><text:span text:style-name="T44">Problema</text:span></text:p>
          <text:p text:style-name="P1"><text:span text:style-name="T19">Saturación de la API por el buscador</text:span></text:p>
          <text:p text:style-name="P1"><text:span text:style-name="T45"/></text:p>
          <text:p text:style-name="P1"><text:span text:style-name="T46">Solución</text:span></text:p>
          <text:p text:style-name="P1"><text:span text:style-name="T47">Debounce 400 ms: clearTimeout cancela la petición anterior antes de lanzar la nuev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Bar" draw:style-name="gr39" draw:text-style-name="P34" draw:layer="layout" svg:width="25.397cm" svg:height="0.696cm" svg:x="0cm" svg:y="13.589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Text" draw:style-name="gr228" draw:text-style-name="P17" draw:layer="layout" svg:width="17.777cm" svg:height="0.696cm" svg:x="0.762cm" svg:y="13.589cm">
          <text:p text:style-name="P1"><text:span text:style-name="T11">Clon de Agapea · Richard &amp; Tomás ·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geNum" draw:style-name="gr229" draw:text-style-name="P15" draw:layer="layout" svg:width="1.267cm" svg:height="0.696cm" svg:x="23.876cm" svg:y="13.589cm">
          <text:p text:style-name="P14"><text:span text:style-name="T11">18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0" draw:layer="layout" svg:width="15.237cm" svg:height="8.57cm" svg:x="1.905cm" svg:y="3.175cm" draw:page-number="17" presentation:class="page"/>
          <draw:frame draw:name="PlaceHolder 2" presentation:style-name="pr19" draw:text-style-name="P6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4" draw:text-style-name="P8" draw:layer="layout" svg:width="8.252cm" svg:height="1.271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18" draw:style-name="dp3" draw:master-page-name="Predeterminado">
        <draw:custom-shape draw:name="Shape 0" draw:style-name="gr1" draw:text-style-name="P2" draw:layer="layout" svg:width="0.149cm" svg:height="1.394cm" svg:x="1.016cm" svg:y="0.55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30" draw:text-style-name="P20" draw:layer="layout" svg:width="23.111cm" svg:height="1.648cm" svg:x="1.397cm" svg:y="0.457cm">
          <text:p text:style-name="P19"><text:span text:style-name="T12">Conclusión y Mejoras Futura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" draw:style-name="gr12" draw:text-style-name="P21" draw:layer="layout" svg:x1="1.016cm" svg:y1="2.159cm" svg:x2="24.384cm" svg:y2="2.16cm">
          <text:p/>
        </draw:line>
        <draw:custom-shape draw:name="Shape 3" draw:style-name="gr39" draw:text-style-name="P22" draw:layer="layout" svg:width="25.397cm" svg:height="0.696cm" svg:x="0cm" svg:y="13.58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31" draw:text-style-name="P20" draw:layer="layout" svg:width="17.777cm" svg:height="0.696cm" svg:x="0.762cm" svg:y="13.589cm">
          <text:p text:style-name="P19"><text:span text:style-name="T13">Clon de Agapea · Richard &amp; Tomás ·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32" draw:text-style-name="P4" draw:layer="layout" svg:width="1.267cm" svg:height="0.696cm" svg:x="23.876cm" svg:y="13.589cm">
          <text:p text:style-name="P3"><text:span text:style-name="T13">1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" draw:text-style-name="P2" draw:layer="layout" svg:width="0.149cm" svg:height="0.886cm" svg:x="1.016cm" svg:y="2.54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33" draw:text-style-name="P20" draw:layer="layout" svg:width="10.919cm" svg:height="0.886cm" svg:x="1.422cm" svg:y="2.54cm">
          <text:p text:style-name="P19"><text:span text:style-name="T22">Conclusion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34" draw:text-style-name="P37" draw:layer="layout" svg:width="11.427cm" svg:height="5.585cm" svg:x="1.016cm" svg:y="3.913cm">
          <text:list text:style-name="L9">
            <text:list-item>
              <text:p text:style-name="P36"><text:span text:style-name="T15">Aplicación funcional con arquitectura desacoplada real</text:span></text:p>
            </text:list-item>
            <text:list-item>
              <text:p text:style-name="P36"><text:span text:style-name="T15">API REST completa: autenticación, CRUD, paginación, filtros</text:span></text:p>
            </text:list-item>
            <text:list-item>
              <text:p text:style-name="P36"><text:span text:style-name="T15">Dominio práctico de MPA vs SPA sin frameworks</text:span></text:p>
            </text:list-item>
            <text:list-item>
              <text:p text:style-name="P36"><text:span text:style-name="T15">Uso responsable y supervisado de herramientas de IA</text:span></text:p>
            </text:list-item>
            <text:list-item>
              <text:p text:style-name="P36"><text:span text:style-name="T15">Base sólida para proyectos profesionales en e-commerce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49" draw:text-style-name="P25" draw:layer="layout" svg:width="0.073cm" svg:height="8.379cm" svg:x="13.081cm" svg:y="2.54cm">
          <text:p text:style-name="P1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235" draw:text-style-name="P40" draw:layer="layout" svg:width="0.149cm" svg:height="0.886cm" svg:x="13.716cm" svg:y="2.54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36" draw:text-style-name="P20" draw:layer="layout" svg:width="10.157cm" svg:height="0.886cm" svg:x="14.122cm" svg:y="2.54cm">
          <text:p text:style-name="P19"><text:span text:style-name="T22">Mejoras Futura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37" draw:text-style-name="P37" draw:layer="layout" svg:width="10.665cm" svg:height="6.601cm" svg:x="13.716cm" svg:y="3.897cm">
          <text:list text:style-name="L9">
            <text:list-item>
              <text:p text:style-name="P36"><text:span text:style-name="T15">Pasarela de pago real: Stripe o Redsys / TPV Virtual</text:span></text:p>
            </text:list-item>
            <text:list-item>
              <text:p text:style-name="P36"><text:span text:style-name="T15">Mailing transaccional: confirmación de pedido y reset de contraseña</text:span></text:p>
            </text:list-item>
            <text:list-item>
              <text:p text:style-name="P36"><text:span text:style-name="T15">Inicio de sesión con Google (OAuth 2.0)</text:span></text:p>
            </text:list-item>
            <text:list-item>
              <text:p text:style-name="P36"><text:span text:style-name="T15">Restricción de CORS en producción + cabeceras de seguridad HTTP</text:span></text:p>
            </text:list-item>
            <text:list-item>
              <text:p text:style-name="P36"><text:span text:style-name="T15">FormRequest Laravel — eliminar riesgo de mass assignment</text:span></text:p>
            </text:list-item>
            <text:list-item>
              <text:p text:style-name="P36"><text:span text:style-name="T15">Módulos de facturación y exportación de informes en el panel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39" draw:text-style-name="P22" draw:layer="layout" svg:width="23.365cm" svg:height="1.775cm" svg:x="1.016cm" svg:y="11.303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238" draw:text-style-name="P4" draw:layer="layout" svg:width="22.857cm" svg:height="1.775cm" svg:x="1.397cm" svg:y="11.303cm">
          <text:p text:style-name="P3"><text:span text:style-name="T48">"Integración práctica de todos los conocimientos del módulo en un entorno realista de desarrollo web."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0" draw:layer="layout" svg:width="15.237cm" svg:height="8.57cm" svg:x="1.905cm" svg:y="3.175cm" draw:page-number="18" presentation:class="page"/>
          <draw:frame draw:name="PlaceHolder 2" presentation:style-name="pr20" draw:text-style-name="P6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4" draw:text-style-name="P8" draw:layer="layout" svg:width="8.252cm" svg:height="1.271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19" draw:style-name="dp1" draw:master-page-name="Predeterminado">
        <draw:custom-shape draw:name="Shape 0" draw:style-name="gr1" draw:text-style-name="P2" draw:layer="layout" svg:width="25.397cm" svg:height="0.302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2" draw:layer="layout" svg:width="25.397cm" svg:height="0.315cm" svg:x="0cm" svg:y="13.9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39" draw:text-style-name="P4" draw:layer="layout" svg:width="22.857cm" svg:height="3.553cm" svg:x="1.27cm" svg:y="3.556cm">
          <text:p text:style-name="P3"><text:span text:style-name="T49">¡Gracias!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40" draw:text-style-name="P4" draw:layer="layout" svg:width="22.857cm" svg:height="1.521cm" svg:x="1.27cm" svg:y="7.62cm">
          <text:p text:style-name="P3"><text:span text:style-name="T50">Richard Clive Elespuru Rojas · Tomás Pitaluga Díaz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41" draw:text-style-name="P4" draw:layer="layout" svg:width="22.857cm" svg:height="1.14cm" svg:x="1.27cm" svg:y="9.398cm">
          <text:p text:style-name="P3"><text:span text:style-name="T5">Clon de Agapea — Plataforma de Venta de Libros Online <text:s/>| <text:s/>ASIR -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0" draw:layer="layout" svg:width="15.237cm" svg:height="8.57cm" svg:x="1.905cm" svg:y="3.175cm" draw:page-number="19" presentation:class="page"/>
          <draw:frame draw:name="PlaceHolder 2" presentation:style-name="pr21" draw:text-style-name="P6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4" draw:text-style-name="P8" draw:layer="layout" svg:width="8.252cm" svg:height="1.271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ea" svg:font-family="+mn-ea"/>
    <style:font-face style:name="+mn-lt" svg:font-family="+mn-lt"/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solid" draw:fill-color="#ffffff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redeterminado-outline3" style:family="presentation" style:parent-style-name="Predeterminad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redeterminado-outline4" style:family="presentation" style:parent-style-name="Predeterminad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solid" draw:fill-color="#ffffff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false" style:shrink-to-fit="true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redeterminado_20_1-outline3" style:display-name="Predeterminado 1-outline3" style:family="presentation" style:parent-style-name="Predeterminado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redeterminado_20_1-outline4" style:display-name="Predeterminado 1-outline4" style:family="presentation" style:parent-style-name="Predeterminado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redeterminado_20_1-outline5" style:display-name="Predeterminado 1-outline5" style:family="presentation" style:parent-style-name="Predeterminado_20_1-outline4">
      <style:paragraph-properties fo:margin-top="0.1cm" fo:margin-bottom="0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.1cm" fo:margin-bottom="0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.1cm" fo:margin-bottom="0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.1cm" fo:margin-bottom="0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.1cm" fo:margin-bottom="0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Predeterminado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DEFAULT-title" draw:layer="backgroundobjects" svg:width="22.858cm" svg:height="2.384cm" svg:x="1.27cm" svg:y="0.57cm" presentation:class="title" presentation:placeholder="true" presentation:user-transformed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redeterminado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Predeterminado-title" draw:layer="backgroundobjects" svg:width="22.859cm" svg:height="2.385cm" svg:x="1.27cm" svg:y="0.57cm" presentation:class="title" presentation:placeholder="true">
        <draw:text-box/>
      </draw:frame>
      <draw:frame presentation:style-name="Predeterminado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Predeterminado-title" draw:layer="backgroundobjects" svg:width="0cm" svg:height="0cm" svg:x="0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redeterminado_20_1" style:display-name="Predeterminado 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Predeterminado_20_1-title" draw:layer="backgroundobjects" svg:width="22.858cm" svg:height="2.384cm" svg:x="1.27cm" svg:y="0.57cm" presentation:class="title" presentation:placeholder="true" presentation:user-transformed="true">
        <draw:text-box/>
      </draw:frame>
      <draw:frame presentation:style-name="Predeterminado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Predeterminado_20_1-title" draw:layer="backgroundobjects" svg:width="0cm" svg:height="0cm" svg:x="0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5-06T10:15:04</meta:creation-date>
    <meta:initial-creator>Richard &amp; Tomás</meta:initial-creator>
    <dc:language>en-US</dc:language>
    <dc:date>2026-05-07T11:54:15.433622100</dc:date>
    <meta:editing-cycles>4</meta:editing-cycles>
    <dc:subject>PptxGenJS Presentation</dc:subject>
    <dc:title>Clon de Agapea</dc:title>
    <meta:editing-duration>PT21M50S</meta:editing-duration>
    <meta:generator>LibreOffice/25.8.5.2$Windows_X86_64 LibreOffice_project/9c8b85f387cc00a89945a79c9e6239f32e450ac2</meta:generator>
    <meta:document-statistic meta:object-count="502"/>
    <meta:user-defined meta:name="AppVersion">15.0000</meta:user-defined>
    <meta:user-defined meta:name="Company">PptxGenJS</meta:user-defined>
    <meta:user-defined meta:name="Notes" meta:value-type="float">18</meta:user-defined>
    <meta:user-defined meta:name="PresentationFormat">On-screen Show (16:9)</meta:user-defined>
    <meta:user-defined meta:name="Slides" meta:value-type="float">18</meta:user-defined>
  </office:meta>
</office:document-meta>
</file>